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1.034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25"/>
    <style:style style:name="ce6" style:family="table-cell" style:parent-style-name="Default" style:data-style-name="N123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5" style:family="table-cell" style:parent-style-name="Default" style:data-style-name="N126"/>
    <style:style style:name="ce9" style:family="table-cell" style:parent-style-name="Default" style:data-style-name="N123">
      <style:table-cell-properties fo:wrap-option="wrap"/>
    </style:style>
    <style:style style:name="ce10" style:family="table-cell" style:parent-style-name="Default" style:data-style-name="N111">
      <style:table-cell-properties fo:wrap-option="wrap"/>
    </style:style>
    <style:style style:name="ce11" style:family="table-cell" style:parent-style-name="Default" style:data-style-name="N111"/>
    <style:style style:name="ce19" style:family="table-cell" style:parent-style-name="Default" style:data-style-name="N126">
      <style:table-cell-properties fo:wrap-option="wrap"/>
    </style:style>
    <style:style style:name="ce20" style:family="table-cell" style:parent-style-name="Default" style:data-style-name="N124">
      <style:table-cell-properties fo:wrap-option="wrap"/>
    </style:style>
    <style:style style:name="ce2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carga R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2"/>
        <table:table-column table:style-name="co2" table:default-cell-style-name="ce1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8" table:default-cell-style-name="ce15"/>
        <table:table-column table:style-name="co1" table:default-cell-style-name="ce15"/>
        <table:table-row table:style-name="ro1">
          <table:table-cell office:value-type="string" calcext:value-type="string">
            <text:p>frequencia</text:p>
          </table:table-cell>
          <table:table-cell table:style-name="ce4" office:value-type="string" calcext:value-type="string">
            <text:p>tensao </text:p>
            <text:p>sobre a </text:p>
            <text:p>Carga</text:p>
            <text:p>Ganho</text:p>
          </table:table-cell>
          <table:table-cell table:style-name="ce4" office:value-type="string" calcext:value-type="string">
            <text:p>tensao </text:p>
            <text:p>sobre a </text:p>
            <text:p>Carga</text:p>
            <text:p>SEM ganho</text:p>
          </table:table-cell>
          <table:table-cell table:style-name="ce4" office:value-type="string" calcext:value-type="string">
            <text:p>tensao </text:p>
            <text:p>saida </text:p>
            <text:p>Sistema de ganho</text:p>
          </table:table-cell>
          <table:table-cell table:style-name="ce4" office:value-type="string" calcext:value-type="string">
            <text:p>V_INA </text:p>
            <text:p> Ganho</text:p>
          </table:table-cell>
          <table:table-cell table:style-name="ce4" office:value-type="string" calcext:value-type="string">
            <text:p>V_INA </text:p>
            <text:p>SEM ganho</text:p>
          </table:table-cell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carga</text:p>
          </table:table-cell>
          <table:table-cell office:value-type="string" calcext:value-type="string">
            <text:p>corrente esperada</text:p>
          </table:table-cell>
          <table:table-cell table:style-name="ce4" office:value-type="string" calcext:value-type="string">
            <text:p>Corrente (INA)</text:p>
            <text:p>Ganho</text:p>
          </table:table-cell>
          <table:table-cell table:style-name="ce4" office:value-type="string" calcext:value-type="string">
            <text:p>Corrente (INA)</text:p>
            <text:p>Sem ganho</text:p>
          </table:table-cell>
          <table:table-cell table:style-name="ce4" office:value-type="string" calcext:value-type="string">
            <text:p>ERRO(%)</text:p>
            <text:p>Ganho</text:p>
          </table:table-cell>
          <table:table-cell table:style-name="ce4" office:value-type="string" calcext:value-type="string">
            <text:p>ERRO(%)</text:p>
            <text:p>SEM ganh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24" calcext:value-type="float">
            <text:p>0,524</text:p>
          </table:table-cell>
          <table:table-cell/>
          <table:table-cell office:value-type="float" office:value="1.033" calcext:value-type="float">
            <text:p>1,033</text:p>
          </table:table-cell>
          <table:table-cell table:style-name="ce6" office:value-type="float" office:value="0.3623" calcext:value-type="float">
            <text:p>0,3623</text:p>
          </table:table-cell>
          <table:table-cell table:style-name="ce6" office:value-type="float" office:value="0.3563" calcext:value-type="float">
            <text:p>0,3563</text:p>
          </table:table-cell>
          <table:table-cell office:value-type="float" office:value="1.02" calcext:value-type="float">
            <text:p>1,02</text:p>
          </table:table-cell>
          <table:table-cell table:style-name="ce3" office:value-type="float" office:value="504" calcext:value-type="float">
            <text:p>504</text:p>
          </table:table-cell>
          <table:table-cell office:value-type="float" office:value="0.001" calcext:value-type="float">
            <text:p>0,001</text:p>
          </table:table-cell>
          <table:table-cell table:formula="of:=[.E2]/(22*16.3)" office:value-type="float" office:value="0.00101031790295594" calcext:value-type="float">
            <text:p>0,0010</text:p>
          </table:table-cell>
          <table:table-cell table:formula="of:=[.F2]/(22*16.3)" office:value-type="float" office:value="0.000993586168432794" calcext:value-type="float">
            <text:p>0,0010</text:p>
          </table:table-cell>
          <table:table-cell table:formula="of:=ABS((([.J2]-[.I2])/[.I2])*100)" office:value-type="float" office:value="1.031790295594" calcext:value-type="float">
            <text:p>1,0</text:p>
          </table:table-cell>
          <table:table-cell table:formula="of:=ABS((([.K2]-[.I2])/[.I2])*100)" office:value-type="float" office:value="0.641383156720597" calcext:value-type="float">
            <text:p>0,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505" calcext:value-type="float">
            <text:p>0,505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3513" calcext:value-type="float">
            <text:p>0,351</text:p>
          </table:table-cell>
          <table:table-cell office:value-type="float" office:value="0.3631" calcext:value-type="float">
            <text:p>0,363</text:p>
          </table:table-cell>
          <table:table-cell office:value-type="float" office:value="1.042" calcext:value-type="float">
            <text:p>1,04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]/(22*16.3)" office:value-type="float" office:value="0.000979643056330173" calcext:value-type="float">
            <text:p>0,0010</text:p>
          </table:table-cell>
          <table:table-cell table:formula="of:=[.F3]/(22*16.3)" office:value-type="float" office:value="0.00101254880089236" calcext:value-type="float">
            <text:p>0,0010</text:p>
          </table:table-cell>
          <table:table-cell table:formula="of:=ABS((([.J3]-[.I3])/[.I3])*100)" office:value-type="float" office:value="2.0356943669827" calcext:value-type="float">
            <text:p>2,0</text:p>
          </table:table-cell>
          <table:table-cell table:formula="of:=ABS((([.K3]-[.I3])/[.I3])*100)" office:value-type="float" office:value="1.25488008923601" calcext:value-type="float">
            <text:p>1,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509" calcext:value-type="float">
            <text:p>0,509</text:p>
          </table:table-cell>
          <table:table-cell/>
          <table:table-cell office:value-type="float" office:value="1.008" calcext:value-type="float">
            <text:p>1,008</text:p>
          </table:table-cell>
          <table:table-cell office:value-type="float" office:value="0.3525" calcext:value-type="float">
            <text:p>0,353</text:p>
          </table:table-cell>
          <table:table-cell office:value-type="float" office:value="0.3646" calcext:value-type="float">
            <text:p>0,365</text:p>
          </table:table-cell>
          <table:table-cell office:value-type="float" office:value="1.047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4]/(22*16.3)" office:value-type="float" office:value="0.000982989403234802" calcext:value-type="float">
            <text:p>0,0010</text:p>
          </table:table-cell>
          <table:table-cell table:formula="of:=[.F4]/(22*16.3)" office:value-type="float" office:value="0.00101673173452315" calcext:value-type="float">
            <text:p>0,0010</text:p>
          </table:table-cell>
          <table:table-cell table:formula="of:=ABS((([.J4]-[.I4])/[.I4])*100)" office:value-type="float" office:value="1.70105967651981" calcext:value-type="float">
            <text:p>1,7</text:p>
          </table:table-cell>
          <table:table-cell table:formula="of:=ABS((([.K4]-[.I4])/[.I4])*100)" office:value-type="float" office:value="1.67317345231501" calcext:value-type="float">
            <text:p>1,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511" calcext:value-type="float">
            <text:p>0,511</text:p>
          </table:table-cell>
          <table:table-cell/>
          <table:table-cell office:value-type="float" office:value="1.01" calcext:value-type="float">
            <text:p>1,010</text:p>
          </table:table-cell>
          <table:table-cell office:value-type="float" office:value="0.354" calcext:value-type="float">
            <text:p>0,354</text:p>
          </table:table-cell>
          <table:table-cell office:value-type="float" office:value="0.3658" calcext:value-type="float">
            <text:p>0,366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5]/(22*16.3)" office:value-type="float" office:value="0.000987172336865588" calcext:value-type="float">
            <text:p>0,0010</text:p>
          </table:table-cell>
          <table:table-cell table:formula="of:=[.F5]/(22*16.3)" office:value-type="float" office:value="0.00102007808142777" calcext:value-type="float">
            <text:p>0,0010</text:p>
          </table:table-cell>
          <table:table-cell table:formula="of:=ABS((([.J5]-[.I5])/[.I5])*100)" office:value-type="float" office:value="1.28276631344119" calcext:value-type="float">
            <text:p>1,3</text:p>
          </table:table-cell>
          <table:table-cell table:formula="of:=ABS((([.K5]-[.I5])/[.I5])*100)" office:value-type="float" office:value="2.00780814277699" calcext:value-type="float">
            <text:p>2,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11" calcext:value-type="float">
            <text:p>0,511</text:p>
          </table:table-cell>
          <table:table-cell/>
          <table:table-cell office:value-type="float" office:value="1.013" calcext:value-type="float">
            <text:p>1,013</text:p>
          </table:table-cell>
          <table:table-cell office:value-type="float" office:value="0.354" calcext:value-type="float">
            <text:p>0,354</text:p>
          </table:table-cell>
          <table:table-cell office:value-type="float" office:value="0.3661" calcext:value-type="float">
            <text:p>0,366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6]/(22*16.3)" office:value-type="float" office:value="0.000987172336865588" calcext:value-type="float">
            <text:p>0,0010</text:p>
          </table:table-cell>
          <table:table-cell table:formula="of:=[.F6]/(22*16.3)" office:value-type="float" office:value="0.00102091466815393" calcext:value-type="float">
            <text:p>0,0010</text:p>
          </table:table-cell>
          <table:table-cell table:formula="of:=ABS((([.J6]-[.I6])/[.I6])*100)" office:value-type="float" office:value="1.28276631344119" calcext:value-type="float">
            <text:p>1,3</text:p>
          </table:table-cell>
          <table:table-cell table:formula="of:=ABS((([.K6]-[.I6])/[.I6])*100)" office:value-type="float" office:value="2.09146681539299" calcext:value-type="float">
            <text:p>2,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511" calcext:value-type="float">
            <text:p>0,511</text:p>
          </table:table-cell>
          <table:table-cell/>
          <table:table-cell office:value-type="float" office:value="1.01" calcext:value-type="float">
            <text:p>1,010</text:p>
          </table:table-cell>
          <table:table-cell office:value-type="float" office:value="0.354" calcext:value-type="float">
            <text:p>0,354</text:p>
          </table:table-cell>
          <table:table-cell office:value-type="float" office:value="0.3663" calcext:value-type="float">
            <text:p>0,366</text:p>
          </table:table-cell>
          <table:table-cell office:value-type="float" office:value="1.051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7]/(22*16.3)" office:value-type="float" office:value="0.000987172336865588" calcext:value-type="float">
            <text:p>0,0010</text:p>
          </table:table-cell>
          <table:table-cell table:formula="of:=[.F7]/(22*16.3)" office:value-type="float" office:value="0.00102147239263804" calcext:value-type="float">
            <text:p>0,0010</text:p>
          </table:table-cell>
          <table:table-cell table:formula="of:=ABS((([.J7]-[.I7])/[.I7])*100)" office:value-type="float" office:value="1.28276631344119" calcext:value-type="float">
            <text:p>1,3</text:p>
          </table:table-cell>
          <table:table-cell table:formula="of:=ABS((([.K7]-[.I7])/[.I7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519" calcext:value-type="float">
            <text:p>0,519</text:p>
          </table:table-cell>
          <table:table-cell/>
          <table:table-cell table:style-name="Default" office:value-type="float" office:value="1.015" calcext:value-type="float">
            <text:p>1,015</text:p>
          </table:table-cell>
          <table:table-cell office:value-type="float" office:value="0.3591" calcext:value-type="float">
            <text:p>0,359</text:p>
          </table:table-cell>
          <table:table-cell office:value-type="float" office:value="0.3661" calcext:value-type="float">
            <text:p>0,366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8]/(22*16.3)" office:value-type="float" office:value="0.00100139431121026" calcext:value-type="float">
            <text:p>0,0010</text:p>
          </table:table-cell>
          <table:table-cell table:formula="of:=[.F8]/(22*16.3)" office:value-type="float" office:value="0.00102091466815393" calcext:value-type="float">
            <text:p>0,0010</text:p>
          </table:table-cell>
          <table:table-cell table:formula="of:=ABS((([.J8]-[.I8])/[.I8])*100)" office:value-type="float" office:value="0.139431121026008" calcext:value-type="float">
            <text:p>0,1</text:p>
          </table:table-cell>
          <table:table-cell table:formula="of:=ABS((([.K8]-[.I8])/[.I8])*100)" office:value-type="float" office:value="2.09146681539299" calcext:value-type="float">
            <text:p>2,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512" calcext:value-type="float">
            <text:p>0,512</text:p>
          </table:table-cell>
          <table:table-cell/>
          <table:table-cell office:value-type="float" office:value="1.015" calcext:value-type="float">
            <text:p>1,015</text:p>
          </table:table-cell>
          <table:table-cell office:value-type="float" office:value="0.3548" calcext:value-type="float">
            <text:p>0,355</text:p>
          </table:table-cell>
          <table:table-cell office:value-type="float" office:value="0.3666" calcext:value-type="float">
            <text:p>0,367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9]/(22*16.3)" office:value-type="float" office:value="0.000989403234802008" calcext:value-type="float">
            <text:p>0,0010</text:p>
          </table:table-cell>
          <table:table-cell table:formula="of:=[.F9]/(22*16.3)" office:value-type="float" office:value="0.00102230897936419" calcext:value-type="float">
            <text:p>0,0010</text:p>
          </table:table-cell>
          <table:table-cell table:formula="of:=ABS((([.J9]-[.I9])/[.I9])*100)" office:value-type="float" office:value="1.05967651979921" calcext:value-type="float">
            <text:p>1,1</text:p>
          </table:table-cell>
          <table:table-cell table:formula="of:=ABS((([.K9]-[.I9])/[.I9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15" calcext:value-type="float">
            <text:p>1,015</text:p>
          </table:table-cell>
          <table:table-cell office:value-type="float" office:value="0.3578" calcext:value-type="float">
            <text:p>0,358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0]/(22*16.3)" office:value-type="float" office:value="0.000997769102063581" calcext:value-type="float">
            <text:p>0,0010</text:p>
          </table:table-cell>
          <table:table-cell table:formula="of:=[.F10]/(22*16.3)" office:value-type="float" office:value="0.00102230897936419" calcext:value-type="float">
            <text:p>0,0010</text:p>
          </table:table-cell>
          <table:table-cell table:formula="of:=ABS((([.J10]-[.I10])/[.I10])*100)" office:value-type="float" office:value="0.2230897936419" calcext:value-type="float">
            <text:p>0,2</text:p>
          </table:table-cell>
          <table:table-cell table:formula="of:=ABS((([.K10]-[.I10])/[.I10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513" calcext:value-type="float">
            <text:p>0,513</text:p>
          </table:table-cell>
          <table:table-cell/>
          <table:table-cell table:style-name="Default" office:value-type="float" office:value="1.04" calcext:value-type="float">
            <text:p>1,04</text:p>
          </table:table-cell>
          <table:table-cell office:value-type="float" office:value="0.3548" calcext:value-type="float">
            <text:p>0,355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1]/(22*16.3)" office:value-type="float" office:value="0.000989403234802008" calcext:value-type="float">
            <text:p>0,0010</text:p>
          </table:table-cell>
          <table:table-cell table:formula="of:=[.F11]/(22*16.3)" office:value-type="float" office:value="0.00102230897936419" calcext:value-type="float">
            <text:p>0,0010</text:p>
          </table:table-cell>
          <table:table-cell table:formula="of:=ABS((([.J11]-[.I11])/[.I11])*100)" office:value-type="float" office:value="1.05967651979921" calcext:value-type="float">
            <text:p>1,1</text:p>
          </table:table-cell>
          <table:table-cell table:formula="of:=ABS((([.K11]-[.I11])/[.I11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53" calcext:value-type="float">
            <text:p>1,053</text:p>
          </table:table-cell>
          <table:table-cell office:value-type="float" office:value="0.3583" calcext:value-type="float">
            <text:p>0,358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2]/(22*16.3)" office:value-type="float" office:value="0.000999163413273843" calcext:value-type="float">
            <text:p>0,0010</text:p>
          </table:table-cell>
          <table:table-cell table:formula="of:=[.F12]/(22*16.3)" office:value-type="float" office:value="0.00102230897936419" calcext:value-type="float">
            <text:p>0,0010</text:p>
          </table:table-cell>
          <table:table-cell table:formula="of:=ABS((([.J12]-[.I12])/[.I12])*100)" office:value-type="float" office:value="0.0836586726156961" calcext:value-type="float">
            <text:p>0,1</text:p>
          </table:table-cell>
          <table:table-cell table:formula="of:=ABS((([.K12]-[.I12])/[.I12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78" calcext:value-type="float">
            <text:p>1,078</text:p>
          </table:table-cell>
          <table:table-cell office:value-type="float" office:value="0.3575" calcext:value-type="float">
            <text:p>0,358</text:p>
          </table:table-cell>
          <table:table-cell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3]/(22*16.3)" office:value-type="float" office:value="0.000996932515337423" calcext:value-type="float">
            <text:p>0,0010</text:p>
          </table:table-cell>
          <table:table-cell table:formula="of:=[.F13]/(22*16.3)" office:value-type="float" office:value="0.00102147239263804" calcext:value-type="float">
            <text:p>0,0010</text:p>
          </table:table-cell>
          <table:table-cell table:formula="of:=ABS((([.J13]-[.I13])/[.I13])*100)" office:value-type="float" office:value="0.306748466257704" calcext:value-type="float">
            <text:p>0,3</text:p>
          </table:table-cell>
          <table:table-cell table:formula="of:=ABS((([.K13]-[.I13])/[.I13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19" calcext:value-type="float">
            <text:p>0,519</text:p>
          </table:table-cell>
          <table:table-cell/>
          <table:table-cell office:value-type="float" office:value="1.068" calcext:value-type="float">
            <text:p>1,068</text:p>
          </table:table-cell>
          <table:table-cell office:value-type="float" office:value="0.3596" calcext:value-type="float">
            <text:p>0,360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4]/(22*16.3)" office:value-type="float" office:value="0.00100278862242052" calcext:value-type="float">
            <text:p>0,0010</text:p>
          </table:table-cell>
          <table:table-cell table:formula="of:=[.F14]/(22*16.3)" office:value-type="float" office:value="0.00102230897936419" calcext:value-type="float">
            <text:p>0,0010</text:p>
          </table:table-cell>
          <table:table-cell table:formula="of:=ABS((([.J14]-[.I14])/[.I14])*100)" office:value-type="float" office:value="0.278862242051995" calcext:value-type="float">
            <text:p>0,3</text:p>
          </table:table-cell>
          <table:table-cell table:formula="of:=ABS((([.K14]-[.I14])/[.I14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1.108" calcext:value-type="float">
            <text:p>1,108</text:p>
          </table:table-cell>
          <table:table-cell office:value-type="float" office:value="0.3568" calcext:value-type="float">
            <text:p>0,357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5]/(22*16.3)" office:value-type="float" office:value="0.000994980479643056" calcext:value-type="float">
            <text:p>0,0010</text:p>
          </table:table-cell>
          <table:table-cell table:formula="of:=[.F15]/(22*16.3)" office:value-type="float" office:value="0.00102230897936419" calcext:value-type="float">
            <text:p>0,0010</text:p>
          </table:table-cell>
          <table:table-cell table:formula="of:=ABS((([.J15]-[.I15])/[.I15])*100)" office:value-type="float" office:value="0.501952035694394" calcext:value-type="float">
            <text:p>0,5</text:p>
          </table:table-cell>
          <table:table-cell table:formula="of:=ABS((([.K15]-[.I15])/[.I15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1.106" calcext:value-type="float">
            <text:p>1,106</text:p>
          </table:table-cell>
          <table:table-cell office:value-type="float" office:value="0.3575" calcext:value-type="float">
            <text:p>0,358</text:p>
          </table:table-cell>
          <table:table-cell office:value-type="float" office:value="0.3666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6]/(22*16.3)" office:value-type="float" office:value="0.000996932515337423" calcext:value-type="float">
            <text:p>0,0010</text:p>
          </table:table-cell>
          <table:table-cell table:formula="of:=[.F16]/(22*16.3)" office:value-type="float" office:value="0.00102230897936419" calcext:value-type="float">
            <text:p>0,0010</text:p>
          </table:table-cell>
          <table:table-cell table:formula="of:=ABS((([.J16]-[.I16])/[.I16])*100)" office:value-type="float" office:value="0.306748466257704" calcext:value-type="float">
            <text:p>0,3</text:p>
          </table:table-cell>
          <table:table-cell table:formula="of:=ABS((([.K16]-[.I16])/[.I16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1.075" calcext:value-type="float">
            <text:p>1,075</text:p>
          </table:table-cell>
          <table:table-cell office:value-type="float" office:value="0.3575" calcext:value-type="float">
            <text:p>0,358</text:p>
          </table:table-cell>
          <table:table-cell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7]/(22*16.3)" office:value-type="float" office:value="0.000996932515337423" calcext:value-type="float">
            <text:p>0,0010</text:p>
          </table:table-cell>
          <table:table-cell table:formula="of:=[.F17]/(22*16.3)" office:value-type="float" office:value="0.00102147239263804" calcext:value-type="float">
            <text:p>0,0010</text:p>
          </table:table-cell>
          <table:table-cell table:formula="of:=ABS((([.J17]-[.I17])/[.I17])*100)" office:value-type="float" office:value="0.306748466257704" calcext:value-type="float">
            <text:p>0,3</text:p>
          </table:table-cell>
          <table:table-cell table:formula="of:=ABS((([.K17]-[.I17])/[.I17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18" calcext:value-type="float">
            <text:p>0,518</text:p>
          </table:table-cell>
          <table:table-cell/>
          <table:table-cell office:value-type="float" office:value="1.088" calcext:value-type="float">
            <text:p>1,088</text:p>
          </table:table-cell>
          <table:table-cell office:value-type="float" office:value="0.3585" calcext:value-type="float">
            <text:p>0,359</text:p>
          </table:table-cell>
          <table:table-cell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8]/(22*16.3)" office:value-type="float" office:value="0.000999721137757948" calcext:value-type="float">
            <text:p>0,0010</text:p>
          </table:table-cell>
          <table:table-cell table:formula="of:=[.F18]/(22*16.3)" office:value-type="float" office:value="0.00102147239263804" calcext:value-type="float">
            <text:p>0,0010</text:p>
          </table:table-cell>
          <table:table-cell table:formula="of:=ABS((([.J18]-[.I18])/[.I18])*100)" office:value-type="float" office:value="0.0278862242052104" calcext:value-type="float">
            <text:p>0,0</text:p>
          </table:table-cell>
          <table:table-cell table:formula="of:=ABS((([.K18]-[.I18])/[.I18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98" calcext:value-type="float">
            <text:p>1,098</text:p>
          </table:table-cell>
          <table:table-cell office:value-type="float" office:value="0.3583" calcext:value-type="float">
            <text:p>0,358</text:p>
          </table:table-cell>
          <table:table-cell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19]/(22*16.3)" office:value-type="float" office:value="0.000999163413273843" calcext:value-type="float">
            <text:p>0,0010</text:p>
          </table:table-cell>
          <table:table-cell table:formula="of:=[.F19]/(22*16.3)" office:value-type="float" office:value="0.00102147239263804" calcext:value-type="float">
            <text:p>0,0010</text:p>
          </table:table-cell>
          <table:table-cell table:formula="of:=ABS((([.J19]-[.I19])/[.I19])*100)" office:value-type="float" office:value="0.0836586726156961" calcext:value-type="float">
            <text:p>0,1</text:p>
          </table:table-cell>
          <table:table-cell table:formula="of:=ABS((([.K19]-[.I19])/[.I19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93" calcext:value-type="float">
            <text:p>1,093</text:p>
          </table:table-cell>
          <table:table-cell office:value-type="float" office:value="0.3583" calcext:value-type="float">
            <text:p>0,358</text:p>
          </table:table-cell>
          <table:table-cell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0]/(22*16.3)" office:value-type="float" office:value="0.000999163413273843" calcext:value-type="float">
            <text:p>0,0010</text:p>
          </table:table-cell>
          <table:table-cell table:formula="of:=[.F20]/(22*16.3)" office:value-type="float" office:value="0.00102147239263804" calcext:value-type="float">
            <text:p>0,0010</text:p>
          </table:table-cell>
          <table:table-cell table:formula="of:=ABS((([.J20]-[.I20])/[.I20])*100)" office:value-type="float" office:value="0.0836586726156961" calcext:value-type="float">
            <text:p>0,1</text:p>
          </table:table-cell>
          <table:table-cell table:formula="of:=ABS((([.K20]-[.I20])/[.I20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1.073" calcext:value-type="float">
            <text:p>1,073</text:p>
          </table:table-cell>
          <table:table-cell office:value-type="float" office:value="0.3573" calcext:value-type="float">
            <text:p>0,357</text:p>
          </table:table-cell>
          <table:table-cell office:value-type="float" office:value="0.3673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1]/(22*16.3)" office:value-type="float" office:value="0.000996374790853318" calcext:value-type="float">
            <text:p>0,0010</text:p>
          </table:table-cell>
          <table:table-cell table:formula="of:=[.F21]/(22*16.3)" office:value-type="float" office:value="0.00102426101505856" calcext:value-type="float">
            <text:p>0,0010</text:p>
          </table:table-cell>
          <table:table-cell table:formula="of:=ABS((([.J21]-[.I21])/[.I21])*100)" office:value-type="float" office:value="0.362520914668212" calcext:value-type="float">
            <text:p>0,4</text:p>
          </table:table-cell>
          <table:table-cell table:formula="of:=ABS((([.K21]-[.I21])/[.I21])*100)" office:value-type="float" office:value="2.42610150585599" calcext:value-type="float">
            <text:p>2,4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float" office:value="1.053" calcext:value-type="float">
            <text:p>1,053</text:p>
          </table:table-cell>
          <table:table-cell office:value-type="float" office:value="0.3583" calcext:value-type="float">
            <text:p>0,358</text:p>
          </table:table-cell>
          <table:table-cell office:value-type="float" office:value="0.3691" calcext:value-type="float">
            <text:p>0,36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2]/(22*16.3)" office:value-type="float" office:value="0.000999163413273843" calcext:value-type="float">
            <text:p>0,0010</text:p>
          </table:table-cell>
          <table:table-cell table:formula="of:=[.F22]/(22*16.3)" office:value-type="float" office:value="0.0010292805354155" calcext:value-type="float">
            <text:p>0,0010</text:p>
          </table:table-cell>
          <table:table-cell table:formula="of:=ABS((([.J22]-[.I22])/[.I22])*100)" office:value-type="float" office:value="0.0836586726156961" calcext:value-type="float">
            <text:p>0,1</text:p>
          </table:table-cell>
          <table:table-cell table:formula="of:=ABS((([.K22]-[.I22])/[.I22])*100)" office:value-type="float" office:value="2.92805354154999" calcext:value-type="float">
            <text:p>2,9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519" calcext:value-type="float">
            <text:p>0,519</text:p>
          </table:table-cell>
          <table:table-cell/>
          <table:table-cell office:value-type="float" office:value="1.07" calcext:value-type="float">
            <text:p>1,070</text:p>
          </table:table-cell>
          <table:table-cell office:value-type="float" office:value="0.3596" calcext:value-type="float">
            <text:p>0,360</text:p>
          </table:table-cell>
          <table:table-cell office:value-type="float" office:value="0.3711" calcext:value-type="float">
            <text:p>0,371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3]/(22*16.3)" office:value-type="float" office:value="0.00100278862242052" calcext:value-type="float">
            <text:p>0,0010</text:p>
          </table:table-cell>
          <table:table-cell table:formula="of:=[.F23]/(22*16.3)" office:value-type="float" office:value="0.00103485778025655" calcext:value-type="float">
            <text:p>0,0010</text:p>
          </table:table-cell>
          <table:table-cell table:formula="of:=ABS((([.J23]-[.I23])/[.I23])*100)" office:value-type="float" office:value="0.278862242051995" calcext:value-type="float">
            <text:p>0,3</text:p>
          </table:table-cell>
          <table:table-cell table:formula="of:=ABS((([.K23]-[.I23])/[.I23])*100)" office:value-type="float" office:value="3.485778025655" calcext:value-type="float">
            <text:p>3,5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523" calcext:value-type="float">
            <text:p>0,523</text:p>
          </table:table-cell>
          <table:table-cell/>
          <table:table-cell office:value-type="float" office:value="1.03" calcext:value-type="float">
            <text:p>1,030</text:p>
          </table:table-cell>
          <table:table-cell office:value-type="float" office:value="0.3641" calcext:value-type="float">
            <text:p>0,364</text:p>
          </table:table-cell>
          <table:table-cell office:value-type="float" office:value="0.3741" calcext:value-type="float">
            <text:p>0,374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4]/(22*16.3)" office:value-type="float" office:value="0.00101533742331288" calcext:value-type="float">
            <text:p>0,0010</text:p>
          </table:table-cell>
          <table:table-cell table:formula="of:=[.F24]/(22*16.3)" office:value-type="float" office:value="0.00104322364751813" calcext:value-type="float">
            <text:p>0,0010</text:p>
          </table:table-cell>
          <table:table-cell table:formula="of:=ABS((([.J24]-[.I24])/[.I24])*100)" office:value-type="float" office:value="1.533742331288" calcext:value-type="float">
            <text:p>1,5</text:p>
          </table:table-cell>
          <table:table-cell table:formula="of:=ABS((([.K24]-[.I24])/[.I24])*100)" office:value-type="float" office:value="4.322364751813" calcext:value-type="float">
            <text:p>4,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525" calcext:value-type="float">
            <text:p>0,525</text:p>
          </table:table-cell>
          <table:table-cell/>
          <table:table-cell office:value-type="float" office:value="1.048" calcext:value-type="float">
            <text:p>1,048</text:p>
          </table:table-cell>
          <table:table-cell office:value-type="float" office:value="0.3656" calcext:value-type="float">
            <text:p>0,366</text:p>
          </table:table-cell>
          <table:table-cell office:value-type="float" office:value="0.3774" calcext:value-type="float">
            <text:p>0,37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5]/(22*16.3)" office:value-type="float" office:value="0.00101952035694367" calcext:value-type="float">
            <text:p>0,0010</text:p>
          </table:table-cell>
          <table:table-cell table:formula="of:=[.F25]/(22*16.3)" office:value-type="float" office:value="0.00105242610150586" calcext:value-type="float">
            <text:p>0,0011</text:p>
          </table:table-cell>
          <table:table-cell table:formula="of:=ABS((([.J25]-[.I25])/[.I25])*100)" office:value-type="float" office:value="1.952035694367" calcext:value-type="float">
            <text:p>2,0</text:p>
          </table:table-cell>
          <table:table-cell table:formula="of:=ABS((([.K25]-[.I25])/[.I25])*100)" office:value-type="float" office:value="5.24261015058599" calcext:value-type="float">
            <text:p>5,2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0.53" calcext:value-type="float">
            <text:p>0,530</text:p>
          </table:table-cell>
          <table:table-cell/>
          <table:table-cell office:value-type="float" office:value="1.043" calcext:value-type="float">
            <text:p>1,043</text:p>
          </table:table-cell>
          <table:table-cell office:value-type="float" office:value="0.3688" calcext:value-type="float">
            <text:p>0,369</text:p>
          </table:table-cell>
          <table:table-cell office:value-type="float" office:value="0.3819" calcext:value-type="float">
            <text:p>0,38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6]/(22*16.3)" office:value-type="float" office:value="0.00102844394868935" calcext:value-type="float">
            <text:p>0,0010</text:p>
          </table:table-cell>
          <table:table-cell table:formula="of:=[.F26]/(22*16.3)" office:value-type="float" office:value="0.00106497490239822" calcext:value-type="float">
            <text:p>0,0011</text:p>
          </table:table-cell>
          <table:table-cell table:formula="of:=ABS((([.J26]-[.I26])/[.I26])*100)" office:value-type="float" office:value="2.84439486893499" calcext:value-type="float">
            <text:p>2,8</text:p>
          </table:table-cell>
          <table:table-cell table:formula="of:=ABS((([.K26]-[.I26])/[.I26])*100)" office:value-type="float" office:value="6.49749023982199" calcext:value-type="float">
            <text:p>6,5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502" calcext:value-type="float">
            <text:p>0,502</text:p>
          </table:table-cell>
          <table:table-cell/>
          <table:table-cell office:value-type="float" office:value="1.023" calcext:value-type="float">
            <text:p>1,023</text:p>
          </table:table-cell>
          <table:table-cell office:value-type="float" office:value="0.3518" calcext:value-type="float">
            <text:p>0,352</text:p>
          </table:table-cell>
          <table:table-cell office:value-type="float" office:value="0.3884" calcext:value-type="float">
            <text:p>0,38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7]/(22*16.3)" office:value-type="float" office:value="0.000981037367540435" calcext:value-type="float">
            <text:p>0,0010</text:p>
          </table:table-cell>
          <table:table-cell table:formula="of:=[.F27]/(22*16.3)" office:value-type="float" office:value="0.00108310094813162" calcext:value-type="float">
            <text:p>0,0011</text:p>
          </table:table-cell>
          <table:table-cell table:formula="of:=ABS((([.J27]-[.I27])/[.I27])*100)" office:value-type="float" office:value="1.89626324595649" calcext:value-type="float">
            <text:p>1,9</text:p>
          </table:table-cell>
          <table:table-cell table:formula="of:=ABS((([.K27]-[.I27])/[.I27])*100)" office:value-type="float" office:value="8.31009481316199" calcext:value-type="float">
            <text:p>8,3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0.507" calcext:value-type="float">
            <text:p>0,507</text:p>
          </table:table-cell>
          <table:table-cell/>
          <table:table-cell office:value-type="float" office:value="0.957" calcext:value-type="float">
            <text:p>0,957</text:p>
          </table:table-cell>
          <table:table-cell office:value-type="float" office:value="0.3548" calcext:value-type="float">
            <text:p>0,355</text:p>
          </table:table-cell>
          <table:table-cell office:value-type="float" office:value="0.3947" calcext:value-type="float">
            <text:p>0,395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8]/(22*16.3)" office:value-type="float" office:value="0.000989403234802008" calcext:value-type="float">
            <text:p>0,0010</text:p>
          </table:table-cell>
          <table:table-cell table:formula="of:=[.F28]/(22*16.3)" office:value-type="float" office:value="0.00110066926938093" calcext:value-type="float">
            <text:p>0,0011</text:p>
          </table:table-cell>
          <table:table-cell table:formula="of:=ABS((([.J28]-[.I28])/[.I28])*100)" office:value-type="float" office:value="1.05967651979921" calcext:value-type="float">
            <text:p>1,1</text:p>
          </table:table-cell>
          <table:table-cell table:formula="of:=ABS((([.K28]-[.I28])/[.I28])*100)" office:value-type="float" office:value="10.066926938093" calcext:value-type="float">
            <text:p>10,1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0.97" calcext:value-type="float">
            <text:p>0,970</text:p>
          </table:table-cell>
          <table:table-cell office:value-type="float" office:value="0.3613" calcext:value-type="float">
            <text:p>0,361</text:p>
          </table:table-cell>
          <table:table-cell office:value-type="float" office:value="0.4013" calcext:value-type="float">
            <text:p>0,401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29]/(22*16.3)" office:value-type="float" office:value="0.00100752928053542" calcext:value-type="float">
            <text:p>0,0010</text:p>
          </table:table-cell>
          <table:table-cell table:formula="of:=[.F29]/(22*16.3)" office:value-type="float" office:value="0.00111907417735639" calcext:value-type="float">
            <text:p>0,0011</text:p>
          </table:table-cell>
          <table:table-cell table:formula="of:=ABS((([.J29]-[.I29])/[.I29])*100)" office:value-type="float" office:value="0.752928053542002" calcext:value-type="float">
            <text:p>0,8</text:p>
          </table:table-cell>
          <table:table-cell table:formula="of:=ABS((([.K29]-[.I29])/[.I29])*100)" office:value-type="float" office:value="11.907417735639" calcext:value-type="float">
            <text:p>11,9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482" calcext:value-type="float">
            <text:p>0,482</text:p>
          </table:table-cell>
          <table:table-cell/>
          <table:table-cell office:value-type="float" office:value="0.744" calcext:value-type="float">
            <text:p>0,744</text:p>
          </table:table-cell>
          <table:table-cell office:value-type="float" office:value="0.3545" calcext:value-type="float">
            <text:p>0,355</text:p>
          </table:table-cell>
          <table:table-cell office:value-type="float" office:value="0.528" calcext:value-type="float">
            <text:p>0,52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0]/(22*16.3)" office:value-type="float" office:value="0.00098856664807585" calcext:value-type="float">
            <text:p>0,0010</text:p>
          </table:table-cell>
          <table:table-cell table:formula="of:=[.F30]/(22*16.3)" office:value-type="float" office:value="0.00147239263803681" calcext:value-type="float">
            <text:p>0,0015</text:p>
          </table:table-cell>
          <table:table-cell table:formula="of:=ABS((([.J30]-[.I30])/[.I30])*100)" office:value-type="float" office:value="1.14333519241501" calcext:value-type="float">
            <text:p>1,1</text:p>
          </table:table-cell>
          <table:table-cell table:formula="of:=ABS((([.K30]-[.I30])/[.I30])*100)" office:value-type="float" office:value="47.239263803681" calcext:value-type="float">
            <text:p>47,2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0.467" calcext:value-type="float">
            <text:p>0,467</text:p>
          </table:table-cell>
          <table:table-cell/>
          <table:table-cell office:value-type="float" office:value="0.576" calcext:value-type="float">
            <text:p>0,576</text:p>
          </table:table-cell>
          <table:table-cell office:value-type="float" office:value="0.3601" calcext:value-type="float">
            <text:p>0,360</text:p>
          </table:table-cell>
          <table:table-cell office:value-type="float" office:value="0.681" calcext:value-type="float">
            <text:p>0,681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1]/(22*16.3)" office:value-type="float" office:value="0.00100418293363079" calcext:value-type="float">
            <text:p>0,0010</text:p>
          </table:table-cell>
          <table:table-cell table:formula="of:=[.F31]/(22*16.3)" office:value-type="float" office:value="0.00189905186837702" calcext:value-type="float">
            <text:p>0,0019</text:p>
          </table:table-cell>
          <table:table-cell table:formula="of:=ABS((([.J31]-[.I31])/[.I31])*100)" office:value-type="float" office:value="0.418293363079001" calcext:value-type="float">
            <text:p>0,4</text:p>
          </table:table-cell>
          <table:table-cell table:formula="of:=ABS((([.K31]-[.I31])/[.I31])*100)" office:value-type="float" office:value="89.905186837702" calcext:value-type="float">
            <text:p>89,9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0.961" calcext:value-type="float">
            <text:p>0,961</text:p>
          </table:table-cell>
          <table:table-cell office:value-type="float" office:value="0.358" calcext:value-type="float">
            <text:p>0,358</text:p>
          </table:table-cell>
          <table:table-cell office:value-type="float" office:value="0.438" calcext:value-type="float">
            <text:p>0,43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2]/(22*16.3)" office:value-type="float" office:value="0.000998326826547685" calcext:value-type="float">
            <text:p>0,0010</text:p>
          </table:table-cell>
          <table:table-cell table:formula="of:=[.F32]/(22*16.3)" office:value-type="float" office:value="0.00122141662018963" calcext:value-type="float">
            <text:p>0,0012</text:p>
          </table:table-cell>
          <table:table-cell table:formula="of:=ABS((([.J32]-[.I32])/[.I32])*100)" office:value-type="float" office:value="0.167317345231501" calcext:value-type="float">
            <text:p>0,2</text:p>
          </table:table-cell>
          <table:table-cell table:formula="of:=ABS((([.K32]-[.I32])/[.I32])*100)" office:value-type="float" office:value="22.141662018963" calcext:value-type="float">
            <text:p>22,1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0.433" calcext:value-type="float">
            <text:p>0,433</text:p>
          </table:table-cell>
          <table:table-cell/>
          <table:table-cell office:value-type="float" office:value="1.803" calcext:value-type="float">
            <text:p>1,803</text:p>
          </table:table-cell>
          <table:table-cell office:value-type="float" office:value="0.3568" calcext:value-type="float">
            <text:p>0,357</text:p>
          </table:table-cell>
          <table:table-cell office:value-type="float" office:value="0.2491" calcext:value-type="float">
            <text:p>0,24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3]/(22*16.3)" office:value-type="float" office:value="0.000994980479643056" calcext:value-type="float">
            <text:p>0,0010</text:p>
          </table:table-cell>
          <table:table-cell table:formula="of:=[.F33]/(22*16.3)" office:value-type="float" office:value="0.000694645844952593" calcext:value-type="float">
            <text:p>0,0007</text:p>
          </table:table-cell>
          <table:table-cell table:formula="of:=ABS((([.J33]-[.I33])/[.I33])*100)" office:value-type="float" office:value="0.501952035694394" calcext:value-type="float">
            <text:p>0,5</text:p>
          </table:table-cell>
          <table:table-cell table:formula="of:=ABS((([.K33]-[.I33])/[.I33])*100)" office:value-type="float" office:value="30.5354155047407" calcext:value-type="float">
            <text:p>30,5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31" calcext:value-type="float">
            <text:p>0,431</text:p>
          </table:table-cell>
          <table:table-cell/>
          <table:table-cell office:value-type="float" office:value="2.774" calcext:value-type="float">
            <text:p>2,774</text:p>
          </table:table-cell>
          <table:table-cell office:value-type="float" office:value="0.3641" calcext:value-type="float">
            <text:p>0,364</text:p>
          </table:table-cell>
          <table:table-cell office:value-type="float" office:value="0.1594" calcext:value-type="float">
            <text:p>0,15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4]/(22*16.3)" office:value-type="float" office:value="0.00101533742331288" calcext:value-type="float">
            <text:p>0,0010</text:p>
          </table:table-cell>
          <table:table-cell table:formula="of:=[.F34]/(22*16.3)" office:value-type="float" office:value="0.000444506413831567" calcext:value-type="float">
            <text:p>0,0004</text:p>
          </table:table-cell>
          <table:table-cell table:formula="of:=ABS((([.J34]-[.I34])/[.I34])*100)" office:value-type="float" office:value="1.533742331288" calcext:value-type="float">
            <text:p>1,5</text:p>
          </table:table-cell>
          <table:table-cell table:formula="of:=ABS((([.K34]-[.I34])/[.I34])*100)" office:value-type="float" office:value="55.5493586168433" calcext:value-type="float">
            <text:p>55,5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0.408" calcext:value-type="float">
            <text:p>0,408</text:p>
          </table:table-cell>
          <table:table-cell/>
          <table:table-cell office:value-type="float" office:value="4.096" calcext:value-type="float">
            <text:p>4,096</text:p>
          </table:table-cell>
          <table:table-cell office:value-type="float" office:value="0.3455" calcext:value-type="float">
            <text:p>0,346</text:p>
          </table:table-cell>
          <table:table-cell office:value-type="float" office:value="0.1104" calcext:value-type="float">
            <text:p>0,11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5]/(22*16.3)" office:value-type="float" office:value="0.000963469046291132" calcext:value-type="float">
            <text:p>0,0010</text:p>
          </table:table-cell>
          <table:table-cell table:formula="of:=[.F35]/(22*16.3)" office:value-type="float" office:value="0.000307863915225878" calcext:value-type="float">
            <text:p>0,0003</text:p>
          </table:table-cell>
          <table:table-cell table:formula="of:=ABS((([.J35]-[.I35])/[.I35])*100)" office:value-type="float" office:value="3.65309537088681" calcext:value-type="float">
            <text:p>3,7</text:p>
          </table:table-cell>
          <table:table-cell table:formula="of:=ABS((([.K35]-[.I35])/[.I35])*100)" office:value-type="float" office:value="69.2136084774122" calcext:value-type="float">
            <text:p>69,2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488" calcext:value-type="float">
            <text:p>0,488</text:p>
          </table:table-cell>
          <table:table-cell/>
          <table:table-cell office:value-type="float" office:value="5.59" calcext:value-type="float">
            <text:p>5,590</text:p>
          </table:table-cell>
          <table:table-cell office:value-type="float" office:value="0.3987" calcext:value-type="float">
            <text:p>0,399</text:p>
          </table:table-cell>
          <table:table-cell office:value-type="float" office:value="0.0779" calcext:value-type="float">
            <text:p>0,07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6]/(22*16.3)" office:value-type="float" office:value="0.00111182375906302" calcext:value-type="float">
            <text:p>0,0011</text:p>
          </table:table-cell>
          <table:table-cell table:formula="of:=[.F36]/(22*16.3)" office:value-type="float" office:value="0.00021723368655884" calcext:value-type="float">
            <text:p>0,0002</text:p>
          </table:table-cell>
          <table:table-cell table:formula="of:=ABS((([.J36]-[.I36])/[.I36])*100)" office:value-type="float" office:value="11.182375906302" calcext:value-type="float">
            <text:p>11,2</text:p>
          </table:table-cell>
          <table:table-cell table:formula="of:=ABS((([.K36]-[.I36])/[.I36])*100)" office:value-type="float" office:value="78.276631344116" calcext:value-type="float">
            <text:p>78,3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0.546" calcext:value-type="float">
            <text:p>0,546</text:p>
          </table:table-cell>
          <table:table-cell/>
          <table:table-cell office:value-type="float" office:value="8.31" calcext:value-type="float">
            <text:p>8,310</text:p>
          </table:table-cell>
          <table:table-cell office:value-type="float" office:value="0.3975" calcext:value-type="float">
            <text:p>0,398</text:p>
          </table:table-cell>
          <table:table-cell office:value-type="float" office:value="0.0541" calcext:value-type="float">
            <text:p>0,054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7]/(22*16.3)" office:value-type="float" office:value="0.00110847741215839" calcext:value-type="float">
            <text:p>0,0011</text:p>
          </table:table-cell>
          <table:table-cell table:formula="of:=[.F37]/(22*16.3)" office:value-type="float" office:value="0.000150864472950363" calcext:value-type="float">
            <text:p>0,0002</text:p>
          </table:table-cell>
          <table:table-cell table:formula="of:=ABS((([.J37]-[.I37])/[.I37])*100)" office:value-type="float" office:value="10.847741215839" calcext:value-type="float">
            <text:p>10,8</text:p>
          </table:table-cell>
          <table:table-cell table:formula="of:=ABS((([.K37]-[.I37])/[.I37])*100)" office:value-type="float" office:value="84.9135527049637" calcext:value-type="float">
            <text:p>84,9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48" calcext:value-type="float">
            <text:p>0,480</text:p>
          </table:table-cell>
          <table:table-cell/>
          <table:table-cell office:value-type="float" office:value="8.41" calcext:value-type="float">
            <text:p>8,410</text:p>
          </table:table-cell>
          <table:table-cell office:value-type="float" office:value="0.3121" calcext:value-type="float">
            <text:p>0,312</text:p>
          </table:table-cell>
          <table:table-cell office:value-type="float" office:value="0.03628" calcext:value-type="float">
            <text:p>0,03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E38]/(22*16.3)" office:value-type="float" office:value="0.000870329057445622" calcext:value-type="float">
            <text:p>0,0009</text:p>
          </table:table-cell>
          <table:table-cell table:formula="of:=[.F38]/(22*16.3)" office:value-type="float" office:value="0.00010117122141662" calcext:value-type="float">
            <text:p>0,0001</text:p>
          </table:table-cell>
          <table:table-cell table:formula="of:=ABS((([.J38]-[.I38])/[.I38])*100)" office:value-type="float" office:value="12.9670942554378" calcext:value-type="float">
            <text:p>13,0</text:p>
          </table:table-cell>
          <table:table-cell table:formula="of:=ABS((([.K38]-[.I38])/[.I38])*100)" office:value-type="float" office:value="89.882877858338" calcext:value-type="float">
            <text:p>89,9</text:p>
          </table:table-cell>
        </table:table-row>
      </table:table>
      <table:table table:name="Carga RC paralelo" table:style-name="ta1">
        <table:table-column table:style-name="co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default-cell-style-name="ce6"/>
        <table:table-column table:style-name="co12" table:default-cell-style-name="ce11"/>
        <table:table-column table:style-name="co1" table:default-cell-style-name="ce15"/>
        <table:table-column table:style-name="co1" table:default-cell-style-name="ce21"/>
        <table:table-row table:style-name="ro1">
          <table:table-cell office:value-type="string" calcext:value-type="string">
            <text:p>frequencia</text:p>
          </table:table-cell>
          <table:table-cell table:style-name="ce4" office:value-type="string" calcext:value-type="string">
            <text:p>tensao </text:p>
            <text:p>sobre a </text:p>
            <text:p>Carga</text:p>
            <text:p>Ganho</text:p>
          </table:table-cell>
          <table:table-cell table:style-name="ce4" office:value-type="string" calcext:value-type="string">
            <text:p>tensao </text:p>
            <text:p>sobre a </text:p>
            <text:p>Carga</text:p>
            <text:p>SEM ganho</text:p>
          </table:table-cell>
          <table:table-cell table:style-name="ce4" office:value-type="string" calcext:value-type="string">
            <text:p>tensao </text:p>
            <text:p>saida </text:p>
            <text:p>Sistema de ganho</text:p>
          </table:table-cell>
          <table:table-cell table:style-name="ce4" office:value-type="string" calcext:value-type="string">
            <text:p>V_INA </text:p>
            <text:p> Ganho</text:p>
          </table:table-cell>
          <table:table-cell table:style-name="ce4" office:value-type="string" calcext:value-type="string">
            <text:p>V_INA </text:p>
            <text:p>SEM ganho</text:p>
          </table:table-cell>
          <table:table-cell office:value-type="string" calcext:value-type="string">
            <text:p>Vin</text:p>
          </table:table-cell>
          <table:table-cell office:value-type="string" calcext:value-type="string" table:number-columns-spanned="2" table:number-rows-spanned="1">
            <text:p>carga (R//C)</text:p>
          </table:table-cell>
          <table:covered-table-cell/>
          <table:table-cell office:value-type="string" calcext:value-type="string">
            <text:p>corrente esperada</text:p>
          </table:table-cell>
          <table:table-cell table:style-name="ce9" office:value-type="string" calcext:value-type="string">
            <text:p>Corrente (INA)</text:p>
            <text:p>Ganho</text:p>
          </table:table-cell>
          <table:table-cell table:style-name="ce10" office:value-type="string" calcext:value-type="string">
            <text:p>Corrente (INA)</text:p>
            <text:p>Sem ganho</text:p>
          </table:table-cell>
          <table:table-cell table:style-name="ce19" office:value-type="string" calcext:value-type="string">
            <text:p>ERRO(%)</text:p>
            <text:p>Ganho</text:p>
          </table:table-cell>
          <table:table-cell table:style-name="ce20" office:value-type="string" calcext:value-type="string">
            <text:p>ERRO(%)</text:p>
            <text:p>SEM ganh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75" calcext:value-type="float">
            <text:p>0,975</text:p>
          </table:table-cell>
          <table:table-cell table:style-name="ce6" office:value-type="float" office:value="0.3603" calcext:value-type="float">
            <text:p>0,3603</text:p>
          </table:table-cell>
          <table:table-cell table:style-name="ce6" office:value-type="float" office:value="0.3555" calcext:value-type="float">
            <text:p>0,3555</text:p>
          </table:table-cell>
          <table:table-cell table:style-name="ce2" office:value-type="float" office:value="0" calcext:value-type="float">
            <text:p>0,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0.001" calcext:value-type="float">
            <text:p>0,001</text:p>
          </table:table-cell>
          <table:table-cell table:formula="of:=[.E2]/(22*16.3)" office:value-type="float" office:value="0.00100474065811489" calcext:value-type="float">
            <text:p>0,0010</text:p>
          </table:table-cell>
          <table:table-cell table:formula="of:=[.F2]/(22*16.3)" office:value-type="float" office:value="0.000991355270496375" calcext:value-type="float">
            <text:p>0,00099</text:p>
          </table:table-cell>
          <table:table-cell table:formula="of:=ABS((([.K2]-[.J2])/[.J2])*100)" office:value-type="float" office:value="0.474065811488988" calcext:value-type="float">
            <text:p>0,5</text:p>
          </table:table-cell>
          <table:table-cell table:formula="of:=ABS((([.L2]-[.J2])/[.J2])*100)" office:value-type="float" office:value="0.864472950362497" calcext:value-type="float">
            <text:p>0,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46" calcext:value-type="float">
            <text:p>0,946</text:p>
          </table:table-cell>
          <table:table-cell table:style-name="ce1" office:value-type="float" office:value="0.3495" calcext:value-type="float">
            <text:p>0,350</text:p>
          </table:table-cell>
          <table:table-cell table:style-name="ce1" office:value-type="float" office:value="0.3633" calcext:value-type="float">
            <text:p>0,363</text:p>
          </table:table-cell>
          <table:table-cell table:style-name="ce2" office:value-type="float" office:value="0" calcext:value-type="float">
            <text:p>0,0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1,8p</text:p>
          </table:table-cell>
          <table:table-cell office:value-type="float" office:value="0.001" calcext:value-type="float">
            <text:p>0,001</text:p>
          </table:table-cell>
          <table:table-cell table:formula="of:=[.E3]/(22*16.3)" office:value-type="float" office:value="0.000974623535973229" calcext:value-type="float">
            <text:p>0,0010</text:p>
          </table:table-cell>
          <table:table-cell table:formula="of:=[.F3]/(22*16.3)" office:value-type="float" office:value="0.00101310652537646" calcext:value-type="float">
            <text:p>0,00101</text:p>
          </table:table-cell>
          <table:table-cell table:formula="of:=ABS((([.K3]-[.J3])/[.J3])*100)" office:value-type="float" office:value="2.5376464026771" calcext:value-type="float">
            <text:p>2,5</text:p>
          </table:table-cell>
          <table:table-cell table:formula="of:=ABS((([.L3]-[.J3])/[.J3])*100)" office:value-type="float" office:value="1.31065253764599" calcext:value-type="float">
            <text:p>1,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54" calcext:value-type="float">
            <text:p>0,954</text:p>
          </table:table-cell>
          <table:table-cell table:style-name="ce1" office:value-type="float" office:value="0.3525" calcext:value-type="float">
            <text:p>0,353</text:p>
          </table:table-cell>
          <table:table-cell table:style-name="ce1" office:value-type="float" office:value="0.3648" calcext:value-type="float">
            <text:p>0,365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4]/(22*16.3)" office:value-type="float" office:value="0.000982989403234802" calcext:value-type="float">
            <text:p>0,0010</text:p>
          </table:table-cell>
          <table:table-cell table:formula="of:=[.F4]/(22*16.3)" office:value-type="float" office:value="0.00101728945900725" calcext:value-type="float">
            <text:p>0,00102</text:p>
          </table:table-cell>
          <table:table-cell table:formula="of:=ABS((([.K4]-[.J4])/[.J4])*100)" office:value-type="float" office:value="1.70105967651981" calcext:value-type="float">
            <text:p>1,7</text:p>
          </table:table-cell>
          <table:table-cell table:formula="of:=ABS((([.L4]-[.J4])/[.J4])*100)" office:value-type="float" office:value="1.72894590072499" calcext:value-type="float">
            <text:p>1,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56" calcext:value-type="float">
            <text:p>0,956</text:p>
          </table:table-cell>
          <table:table-cell table:style-name="ce6" office:value-type="float" office:value="0.3538" calcext:value-type="float">
            <text:p>0,3538</text:p>
          </table:table-cell>
          <table:table-cell table:style-name="ce6" office:value-type="float" office:value="0.3656" calcext:value-type="float">
            <text:p>0,365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5]/(22*16.3)" office:value-type="float" office:value="0.000986614612381483" calcext:value-type="float">
            <text:p>0,0010</text:p>
          </table:table-cell>
          <table:table-cell table:formula="of:=[.F5]/(22*16.3)" office:value-type="float" office:value="0.00101952035694367" calcext:value-type="float">
            <text:p>0,00102</text:p>
          </table:table-cell>
          <table:table-cell table:formula="of:=ABS((([.K5]-[.J5])/[.J5])*100)" office:value-type="float" office:value="1.3385387618517" calcext:value-type="float">
            <text:p>1,3</text:p>
          </table:table-cell>
          <table:table-cell table:formula="of:=ABS((([.L5]-[.J5])/[.J5])*100)" office:value-type="float" office:value="1.952035694367" calcext:value-type="float">
            <text:p>2,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57" calcext:value-type="float">
            <text:p>0,957</text:p>
          </table:table-cell>
          <table:table-cell table:style-name="ce1" office:value-type="float" office:value="0.3548" calcext:value-type="float">
            <text:p>0,355</text:p>
          </table:table-cell>
          <table:table-cell table:style-name="ce1" office:value-type="float" office:value="0.3661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6]/(22*16.3)" office:value-type="float" office:value="0.000989403234802008" calcext:value-type="float">
            <text:p>0,0010</text:p>
          </table:table-cell>
          <table:table-cell table:formula="of:=[.F6]/(22*16.3)" office:value-type="float" office:value="0.00102091466815393" calcext:value-type="float">
            <text:p>0,00102</text:p>
          </table:table-cell>
          <table:table-cell table:formula="of:=ABS((([.K6]-[.J6])/[.J6])*100)" office:value-type="float" office:value="1.05967651979921" calcext:value-type="float">
            <text:p>1,1</text:p>
          </table:table-cell>
          <table:table-cell table:formula="of:=ABS((([.L6]-[.J6])/[.J6])*100)" office:value-type="float" office:value="2.09146681539299" calcext:value-type="float">
            <text:p>2,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58" calcext:value-type="float">
            <text:p>0,958</text:p>
          </table:table-cell>
          <table:table-cell table:style-name="ce1" office:value-type="float" office:value="0.3553" calcext:value-type="float">
            <text:p>0,355</text:p>
          </table:table-cell>
          <table:table-cell table:style-name="ce1" office:value-type="float" office:value="0.3661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7]/(22*16.3)" office:value-type="float" office:value="0.00099079754601227" calcext:value-type="float">
            <text:p>0,0010</text:p>
          </table:table-cell>
          <table:table-cell table:formula="of:=[.F7]/(22*16.3)" office:value-type="float" office:value="0.00102091466815393" calcext:value-type="float">
            <text:p>0,00102</text:p>
          </table:table-cell>
          <table:table-cell table:formula="of:=ABS((([.K7]-[.J7])/[.J7])*100)" office:value-type="float" office:value="0.920245398773004" calcext:value-type="float">
            <text:p>0,9</text:p>
          </table:table-cell>
          <table:table-cell table:formula="of:=ABS((([.L7]-[.J7])/[.J7])*100)" office:value-type="float" office:value="2.09146681539299" calcext:value-type="float">
            <text:p>2,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office:value-type="float" office:value="0.959" calcext:value-type="float">
            <text:p>0,959</text:p>
          </table:table-cell>
          <table:table-cell table:style-name="ce6" office:value-type="float" office:value="0.3553" calcext:value-type="float">
            <text:p>0,3553</text:p>
          </table:table-cell>
          <table:table-cell table:style-name="ce6" office:value-type="float" office:value="0.3663" calcext:value-type="float">
            <text:p>0,366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8]/(22*16.3)" office:value-type="float" office:value="0.00099079754601227" calcext:value-type="float">
            <text:p>0,0010</text:p>
          </table:table-cell>
          <table:table-cell table:formula="of:=[.F8]/(22*16.3)" office:value-type="float" office:value="0.00102147239263804" calcext:value-type="float">
            <text:p>0,00102</text:p>
          </table:table-cell>
          <table:table-cell table:formula="of:=ABS((([.K8]-[.J8])/[.J8])*100)" office:value-type="float" office:value="0.920245398773004" calcext:value-type="float">
            <text:p>0,9</text:p>
          </table:table-cell>
          <table:table-cell table:formula="of:=ABS((([.L8]-[.J8])/[.J8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82" calcext:value-type="float">
            <text:p>0,982</text:p>
          </table:table-cell>
          <table:table-cell table:style-name="ce1" office:value-type="float" office:value="0.3553" calcext:value-type="float">
            <text:p>0,355</text:p>
          </table:table-cell>
          <table:table-cell table:style-name="ce1" office:value-type="float" office:value="0.3666" calcext:value-type="float">
            <text:p>0,36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9]/(22*16.3)" office:value-type="float" office:value="0.00099079754601227" calcext:value-type="float">
            <text:p>0,0010</text:p>
          </table:table-cell>
          <table:table-cell table:formula="of:=[.F9]/(22*16.3)" office:value-type="float" office:value="0.00102230897936419" calcext:value-type="float">
            <text:p>0,00102</text:p>
          </table:table-cell>
          <table:table-cell table:formula="of:=ABS((([.K9]-[.J9])/[.J9])*100)" office:value-type="float" office:value="0.920245398773004" calcext:value-type="float">
            <text:p>0,9</text:p>
          </table:table-cell>
          <table:table-cell table:formula="of:=ABS((([.L9]-[.J9])/[.J9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76" calcext:value-type="float">
            <text:p>0,976</text:p>
          </table:table-cell>
          <table:table-cell table:style-name="ce1" office:value-type="float" office:value="0.3555" calcext:value-type="float">
            <text:p>0,356</text:p>
          </table:table-cell>
          <table:table-cell table:style-name="ce1" office:value-type="float" office:value="0.3663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0]/(22*16.3)" office:value-type="float" office:value="0.000991355270496375" calcext:value-type="float">
            <text:p>0,0010</text:p>
          </table:table-cell>
          <table:table-cell table:formula="of:=[.F10]/(22*16.3)" office:value-type="float" office:value="0.00102147239263804" calcext:value-type="float">
            <text:p>0,00102</text:p>
          </table:table-cell>
          <table:table-cell table:formula="of:=ABS((([.K10]-[.J10])/[.J10])*100)" office:value-type="float" office:value="0.864472950362497" calcext:value-type="float">
            <text:p>0,9</text:p>
          </table:table-cell>
          <table:table-cell table:formula="of:=ABS((([.L10]-[.J10])/[.J10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office:value-type="float" office:value="0.977" calcext:value-type="float">
            <text:p>0,977</text:p>
          </table:table-cell>
          <table:table-cell table:style-name="ce6" office:value-type="float" office:value="0.3558" calcext:value-type="float">
            <text:p>0,3558</text:p>
          </table:table-cell>
          <table:table-cell table:style-name="ce6" office:value-type="float" office:value="0.3663" calcext:value-type="float">
            <text:p>0,366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1]/(22*16.3)" office:value-type="float" office:value="0.000992191857222532" calcext:value-type="float">
            <text:p>0,0010</text:p>
          </table:table-cell>
          <table:table-cell table:formula="of:=[.F11]/(22*16.3)" office:value-type="float" office:value="0.00102147239263804" calcext:value-type="float">
            <text:p>0,00102</text:p>
          </table:table-cell>
          <table:table-cell table:formula="of:=ABS((([.K11]-[.J11])/[.J11])*100)" office:value-type="float" office:value="0.780814277746801" calcext:value-type="float">
            <text:p>0,8</text:p>
          </table:table-cell>
          <table:table-cell table:formula="of:=ABS((([.L11]-[.J11])/[.J11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33" calcext:value-type="float">
            <text:p>1,033</text:p>
          </table:table-cell>
          <table:table-cell table:style-name="ce1" office:value-type="float" office:value="0.3588" calcext:value-type="float">
            <text:p>0,359</text:p>
          </table:table-cell>
          <table:table-cell table:style-name="ce1" office:value-type="float" office:value="0.3666" calcext:value-type="float">
            <text:p>0,36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2]/(22*16.3)" office:value-type="float" office:value="0.0010005577244841" calcext:value-type="float">
            <text:p>0,0010</text:p>
          </table:table-cell>
          <table:table-cell table:formula="of:=[.F12]/(22*16.3)" office:value-type="float" office:value="0.00102230897936419" calcext:value-type="float">
            <text:p>0,00102</text:p>
          </table:table-cell>
          <table:table-cell table:formula="of:=ABS((([.K12]-[.J12])/[.J12])*100)" office:value-type="float" office:value="0.0557724484100087" calcext:value-type="float">
            <text:p>0,1</text:p>
          </table:table-cell>
          <table:table-cell table:formula="of:=ABS((([.L12]-[.J12])/[.J12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11" calcext:value-type="float">
            <text:p>1,011</text:p>
          </table:table-cell>
          <table:table-cell table:style-name="ce1" office:value-type="float" office:value="0.356" calcext:value-type="float">
            <text:p>0,356</text:p>
          </table:table-cell>
          <table:table-cell table:style-name="ce1" office:value-type="float" office:value="0.3666" calcext:value-type="float">
            <text:p>0,36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3]/(22*16.3)" office:value-type="float" office:value="0.000992749581706637" calcext:value-type="float">
            <text:p>0,0010</text:p>
          </table:table-cell>
          <table:table-cell table:formula="of:=[.F13]/(22*16.3)" office:value-type="float" office:value="0.00102230897936419" calcext:value-type="float">
            <text:p>0,00102</text:p>
          </table:table-cell>
          <table:table-cell table:formula="of:=ABS((([.K13]-[.J13])/[.J13])*100)" office:value-type="float" office:value="0.725041829336293" calcext:value-type="float">
            <text:p>0,7</text:p>
          </table:table-cell>
          <table:table-cell table:formula="of:=ABS((([.L13]-[.J13])/[.J13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43" calcext:value-type="float">
            <text:p>1,043</text:p>
          </table:table-cell>
          <table:table-cell table:style-name="ce6" office:value-type="float" office:value="0.3623" calcext:value-type="float">
            <text:p>0,3623</text:p>
          </table:table-cell>
          <table:table-cell table:style-name="ce6" office:value-type="float" office:value="0.3663" calcext:value-type="float">
            <text:p>0,366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4]/(22*16.3)" office:value-type="float" office:value="0.00101031790295594" calcext:value-type="float">
            <text:p>0,0010</text:p>
          </table:table-cell>
          <table:table-cell table:formula="of:=[.F14]/(22*16.3)" office:value-type="float" office:value="0.00102147239263804" calcext:value-type="float">
            <text:p>0,00102</text:p>
          </table:table-cell>
          <table:table-cell table:formula="of:=ABS((([.K14]-[.J14])/[.J14])*100)" office:value-type="float" office:value="1.031790295594" calcext:value-type="float">
            <text:p>1,0</text:p>
          </table:table-cell>
          <table:table-cell table:formula="of:=ABS((([.L14]-[.J14])/[.J14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41" calcext:value-type="float">
            <text:p>1,041</text:p>
          </table:table-cell>
          <table:table-cell table:style-name="ce1" office:value-type="float" office:value="0.3578" calcext:value-type="float">
            <text:p>0,358</text:p>
          </table:table-cell>
          <table:table-cell table:style-name="ce1" office:value-type="float" office:value="0.3663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5]/(22*16.3)" office:value-type="float" office:value="0.000997769102063581" calcext:value-type="float">
            <text:p>0,0010</text:p>
          </table:table-cell>
          <table:table-cell table:formula="of:=[.F15]/(22*16.3)" office:value-type="float" office:value="0.00102147239263804" calcext:value-type="float">
            <text:p>0,00102</text:p>
          </table:table-cell>
          <table:table-cell table:formula="of:=ABS((([.K15]-[.J15])/[.J15])*100)" office:value-type="float" office:value="0.2230897936419" calcext:value-type="float">
            <text:p>0,2</text:p>
          </table:table-cell>
          <table:table-cell table:formula="of:=ABS((([.L15]-[.J15])/[.J15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41" calcext:value-type="float">
            <text:p>1,041</text:p>
          </table:table-cell>
          <table:table-cell table:style-name="ce1" office:value-type="float" office:value="0.3575" calcext:value-type="float">
            <text:p>0,358</text:p>
          </table:table-cell>
          <table:table-cell table:style-name="ce1" office:value-type="float" office:value="0.3663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6]/(22*16.3)" office:value-type="float" office:value="0.000996932515337423" calcext:value-type="float">
            <text:p>0,0010</text:p>
          </table:table-cell>
          <table:table-cell table:formula="of:=[.F16]/(22*16.3)" office:value-type="float" office:value="0.00102147239263804" calcext:value-type="float">
            <text:p>0,00102</text:p>
          </table:table-cell>
          <table:table-cell table:formula="of:=ABS((([.K16]-[.J16])/[.J16])*100)" office:value-type="float" office:value="0.306748466257704" calcext:value-type="float">
            <text:p>0,3</text:p>
          </table:table-cell>
          <table:table-cell table:formula="of:=ABS((([.L16]-[.J16])/[.J16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25" calcext:value-type="float">
            <text:p>1,025</text:p>
          </table:table-cell>
          <table:table-cell table:style-name="ce6" office:value-type="float" office:value="0.358" calcext:value-type="float">
            <text:p>0,3580</text:p>
          </table:table-cell>
          <table:table-cell table:style-name="ce6" office:value-type="float" office:value="0.3663" calcext:value-type="float">
            <text:p>0,366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7]/(22*16.3)" office:value-type="float" office:value="0.000998326826547685" calcext:value-type="float">
            <text:p>0,0010</text:p>
          </table:table-cell>
          <table:table-cell table:formula="of:=[.F17]/(22*16.3)" office:value-type="float" office:value="0.00102147239263804" calcext:value-type="float">
            <text:p>0,00102</text:p>
          </table:table-cell>
          <table:table-cell table:formula="of:=ABS((([.K17]-[.J17])/[.J17])*100)" office:value-type="float" office:value="0.167317345231501" calcext:value-type="float">
            <text:p>0,2</text:p>
          </table:table-cell>
          <table:table-cell table:formula="of:=ABS((([.L17]-[.J17])/[.J17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14" calcext:value-type="float">
            <text:p>1,014</text:p>
          </table:table-cell>
          <table:table-cell table:style-name="ce1" office:value-type="float" office:value="0.3601" calcext:value-type="float">
            <text:p>0,360</text:p>
          </table:table-cell>
          <table:table-cell table:style-name="ce1" office:value-type="float" office:value="0.3663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8]/(22*16.3)" office:value-type="float" office:value="0.00100418293363079" calcext:value-type="float">
            <text:p>0,0010</text:p>
          </table:table-cell>
          <table:table-cell table:formula="of:=[.F18]/(22*16.3)" office:value-type="float" office:value="0.00102147239263804" calcext:value-type="float">
            <text:p>0,00102</text:p>
          </table:table-cell>
          <table:table-cell table:formula="of:=ABS((([.K18]-[.J18])/[.J18])*100)" office:value-type="float" office:value="0.418293363079001" calcext:value-type="float">
            <text:p>0,4</text:p>
          </table:table-cell>
          <table:table-cell table:formula="of:=ABS((([.L18]-[.J18])/[.J18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27" calcext:value-type="float">
            <text:p>1,027</text:p>
          </table:table-cell>
          <table:table-cell table:style-name="ce1" office:value-type="float" office:value="0.356" calcext:value-type="float">
            <text:p>0,356</text:p>
          </table:table-cell>
          <table:table-cell table:style-name="ce1" office:value-type="float" office:value="0.3663" calcext:value-type="float">
            <text:p>0,366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19]/(22*16.3)" office:value-type="float" office:value="0.000992749581706637" calcext:value-type="float">
            <text:p>0,0010</text:p>
          </table:table-cell>
          <table:table-cell table:formula="of:=[.F19]/(22*16.3)" office:value-type="float" office:value="0.00102147239263804" calcext:value-type="float">
            <text:p>0,00102</text:p>
          </table:table-cell>
          <table:table-cell table:formula="of:=ABS((([.K19]-[.J19])/[.J19])*100)" office:value-type="float" office:value="0.725041829336293" calcext:value-type="float">
            <text:p>0,7</text:p>
          </table:table-cell>
          <table:table-cell table:formula="of:=ABS((([.L19]-[.J19])/[.J19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25" calcext:value-type="float">
            <text:p>1,025</text:p>
          </table:table-cell>
          <table:table-cell table:style-name="ce6" office:value-type="float" office:value="0.355" calcext:value-type="float">
            <text:p>0,3550</text:p>
          </table:table-cell>
          <table:table-cell table:style-name="ce6" office:value-type="float" office:value="0.3663" calcext:value-type="float">
            <text:p>0,366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0]/(22*16.3)" office:value-type="float" office:value="0.000989960959286113" calcext:value-type="float">
            <text:p>0,0010</text:p>
          </table:table-cell>
          <table:table-cell table:formula="of:=[.F20]/(22*16.3)" office:value-type="float" office:value="0.00102147239263804" calcext:value-type="float">
            <text:p>0,00102</text:p>
          </table:table-cell>
          <table:table-cell table:formula="of:=ABS((([.K20]-[.J20])/[.J20])*100)" office:value-type="float" office:value="1.0039040713887" calcext:value-type="float">
            <text:p>1,0</text:p>
          </table:table-cell>
          <table:table-cell table:formula="of:=ABS((([.L20]-[.J20])/[.J20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03" calcext:value-type="float">
            <text:p>1,003</text:p>
          </table:table-cell>
          <table:table-cell table:style-name="ce1" office:value-type="float" office:value="0.3588" calcext:value-type="float">
            <text:p>0,359</text:p>
          </table:table-cell>
          <table:table-cell table:style-name="ce1" office:value-type="float" office:value="0.3673" calcext:value-type="float">
            <text:p>0,36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1]/(22*16.3)" office:value-type="float" office:value="0.0010005577244841" calcext:value-type="float">
            <text:p>0,0010</text:p>
          </table:table-cell>
          <table:table-cell table:formula="of:=[.F21]/(22*16.3)" office:value-type="float" office:value="0.00102426101505856" calcext:value-type="float">
            <text:p>0,00102</text:p>
          </table:table-cell>
          <table:table-cell table:formula="of:=ABS((([.K21]-[.J21])/[.J21])*100)" office:value-type="float" office:value="0.0557724484100087" calcext:value-type="float">
            <text:p>0,1</text:p>
          </table:table-cell>
          <table:table-cell table:formula="of:=ABS((([.L21]-[.J21])/[.J21])*100)" office:value-type="float" office:value="2.42610150585599" calcext:value-type="float">
            <text:p>2,4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002" calcext:value-type="float">
            <text:p>1,002</text:p>
          </table:table-cell>
          <table:table-cell table:style-name="ce1" office:value-type="float" office:value="0.358" calcext:value-type="float">
            <text:p>0,358</text:p>
          </table:table-cell>
          <table:table-cell table:style-name="ce1" office:value-type="float" office:value="0.3688" calcext:value-type="float">
            <text:p>0,369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2]/(22*16.3)" office:value-type="float" office:value="0.000998326826547685" calcext:value-type="float">
            <text:p>0,0010</text:p>
          </table:table-cell>
          <table:table-cell table:formula="of:=[.F22]/(22*16.3)" office:value-type="float" office:value="0.00102844394868935" calcext:value-type="float">
            <text:p>0,00103</text:p>
          </table:table-cell>
          <table:table-cell table:formula="of:=ABS((([.K22]-[.J22])/[.J22])*100)" office:value-type="float" office:value="0.167317345231501" calcext:value-type="float">
            <text:p>0,2</text:p>
          </table:table-cell>
          <table:table-cell table:formula="of:=ABS((([.L22]-[.J22])/[.J22])*100)" office:value-type="float" office:value="2.84439486893499" calcext:value-type="float">
            <text:p>2,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93" calcext:value-type="float">
            <text:p>0,993</text:p>
          </table:table-cell>
          <table:table-cell table:style-name="ce6" office:value-type="float" office:value="0.3591" calcext:value-type="float">
            <text:p>0,3591</text:p>
          </table:table-cell>
          <table:table-cell table:style-name="ce6" office:value-type="float" office:value="0.3714" calcext:value-type="float">
            <text:p>0,3714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3]/(22*16.3)" office:value-type="float" office:value="0.00100139431121026" calcext:value-type="float">
            <text:p>0,0010</text:p>
          </table:table-cell>
          <table:table-cell table:formula="of:=[.F23]/(22*16.3)" office:value-type="float" office:value="0.00103569436698271" calcext:value-type="float">
            <text:p>0,00104</text:p>
          </table:table-cell>
          <table:table-cell table:formula="of:=ABS((([.K23]-[.J23])/[.J23])*100)" office:value-type="float" office:value="0.139431121026008" calcext:value-type="float">
            <text:p>0,1</text:p>
          </table:table-cell>
          <table:table-cell table:formula="of:=ABS((([.L23]-[.J23])/[.J23])*100)" office:value-type="float" office:value="3.569436698271" calcext:value-type="float">
            <text:p>3,6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81" calcext:value-type="float">
            <text:p>0,981</text:p>
          </table:table-cell>
          <table:table-cell table:style-name="ce1" office:value-type="float" office:value="0.3608" calcext:value-type="float">
            <text:p>0,361</text:p>
          </table:table-cell>
          <table:table-cell table:style-name="ce1" office:value-type="float" office:value="0.3741" calcext:value-type="float">
            <text:p>0,374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4]/(22*16.3)" office:value-type="float" office:value="0.00100613496932515" calcext:value-type="float">
            <text:p>0,0010</text:p>
          </table:table-cell>
          <table:table-cell table:formula="of:=[.F24]/(22*16.3)" office:value-type="float" office:value="0.00104322364751813" calcext:value-type="float">
            <text:p>0,00104</text:p>
          </table:table-cell>
          <table:table-cell table:formula="of:=ABS((([.K24]-[.J24])/[.J24])*100)" office:value-type="float" office:value="0.613496932514996" calcext:value-type="float">
            <text:p>0,6</text:p>
          </table:table-cell>
          <table:table-cell table:formula="of:=ABS((([.L24]-[.J24])/[.J24])*100)" office:value-type="float" office:value="4.322364751813" calcext:value-type="float">
            <text:p>4,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76" calcext:value-type="float">
            <text:p>0,976</text:p>
          </table:table-cell>
          <table:table-cell table:style-name="ce1" office:value-type="float" office:value="0.3628" calcext:value-type="float">
            <text:p>0,363</text:p>
          </table:table-cell>
          <table:table-cell table:style-name="ce1" office:value-type="float" office:value="0.3776" calcext:value-type="float">
            <text:p>0,378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5]/(22*16.3)" office:value-type="float" office:value="0.0010117122141662" calcext:value-type="float">
            <text:p>0,0010</text:p>
          </table:table-cell>
          <table:table-cell table:formula="of:=[.F25]/(22*16.3)" office:value-type="float" office:value="0.00105298382598996" calcext:value-type="float">
            <text:p>0,00105</text:p>
          </table:table-cell>
          <table:table-cell table:formula="of:=ABS((([.K25]-[.J25])/[.J25])*100)" office:value-type="float" office:value="1.17122141662001" calcext:value-type="float">
            <text:p>1,2</text:p>
          </table:table-cell>
          <table:table-cell table:formula="of:=ABS((([.L25]-[.J25])/[.J25])*100)" office:value-type="float" office:value="5.298382598996" calcext:value-type="float">
            <text:p>5,3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68" calcext:value-type="float">
            <text:p>0,968</text:p>
          </table:table-cell>
          <table:table-cell table:style-name="ce6" office:value-type="float" office:value="0.347" calcext:value-type="float">
            <text:p>0,3470</text:p>
          </table:table-cell>
          <table:table-cell table:style-name="ce6" office:value-type="float" office:value="0.3817" calcext:value-type="float">
            <text:p>0,381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6]/(22*16.3)" office:value-type="float" office:value="0.000967651979921919" calcext:value-type="float">
            <text:p>0,0010</text:p>
          </table:table-cell>
          <table:table-cell table:formula="of:=[.F26]/(22*16.3)" office:value-type="float" office:value="0.00106441717791411" calcext:value-type="float">
            <text:p>0,00106</text:p>
          </table:table-cell>
          <table:table-cell table:formula="of:=ABS((([.K26]-[.J26])/[.J26])*100)" office:value-type="float" office:value="3.2348020078081" calcext:value-type="float">
            <text:p>3,2</text:p>
          </table:table-cell>
          <table:table-cell table:formula="of:=ABS((([.L26]-[.J26])/[.J26])*100)" office:value-type="float" office:value="6.44171779141101" calcext:value-type="float">
            <text:p>6,4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44" calcext:value-type="float">
            <text:p>0,944</text:p>
          </table:table-cell>
          <table:table-cell table:style-name="ce1" office:value-type="float" office:value="0.3482" calcext:value-type="float">
            <text:p>0,348</text:p>
          </table:table-cell>
          <table:table-cell table:style-name="ce1" office:value-type="float" office:value="0.3869" calcext:value-type="float">
            <text:p>0,38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7]/(22*16.3)" office:value-type="float" office:value="0.000970998326826548" calcext:value-type="float">
            <text:p>0,0010</text:p>
          </table:table-cell>
          <table:table-cell table:formula="of:=[.F27]/(22*16.3)" office:value-type="float" office:value="0.00107891801450084" calcext:value-type="float">
            <text:p>0,00108</text:p>
          </table:table-cell>
          <table:table-cell table:formula="of:=ABS((([.K27]-[.J27])/[.J27])*100)" office:value-type="float" office:value="2.90016731734521" calcext:value-type="float">
            <text:p>2,9</text:p>
          </table:table-cell>
          <table:table-cell table:formula="of:=ABS((([.L27]-[.J27])/[.J27])*100)" office:value-type="float" office:value="7.89180145008401" calcext:value-type="float">
            <text:p>7,9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23" calcext:value-type="float">
            <text:p>0,923</text:p>
          </table:table-cell>
          <table:table-cell table:style-name="ce1" office:value-type="float" office:value="0.3533" calcext:value-type="float">
            <text:p>0,353</text:p>
          </table:table-cell>
          <table:table-cell table:style-name="ce1" office:value-type="float" office:value="0.3927" calcext:value-type="float">
            <text:p>0,39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8]/(22*16.3)" office:value-type="float" office:value="0.000985220301171221" calcext:value-type="float">
            <text:p>0,0010</text:p>
          </table:table-cell>
          <table:table-cell table:formula="of:=[.F28]/(22*16.3)" office:value-type="float" office:value="0.00109509202453988" calcext:value-type="float">
            <text:p>0,00110</text:p>
          </table:table-cell>
          <table:table-cell table:formula="of:=ABS((([.K28]-[.J28])/[.J28])*100)" office:value-type="float" office:value="1.47796988287791" calcext:value-type="float">
            <text:p>1,5</text:p>
          </table:table-cell>
          <table:table-cell table:formula="of:=ABS((([.L28]-[.J28])/[.J28])*100)" office:value-type="float" office:value="9.50920245398801" calcext:value-type="float">
            <text:p>9,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29" calcext:value-type="float">
            <text:p>0,929</text:p>
          </table:table-cell>
          <table:table-cell table:style-name="ce6" office:value-type="float" office:value="0.3611" calcext:value-type="float">
            <text:p>0,3611</text:p>
          </table:table-cell>
          <table:table-cell table:style-name="ce6" office:value-type="float" office:value="0.3993" calcext:value-type="float">
            <text:p>0,399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29]/(22*16.3)" office:value-type="float" office:value="0.00100697155605131" calcext:value-type="float">
            <text:p>0,0010</text:p>
          </table:table-cell>
          <table:table-cell table:formula="of:=[.F29]/(22*16.3)" office:value-type="float" office:value="0.00111349693251534" calcext:value-type="float">
            <text:p>0,00111</text:p>
          </table:table-cell>
          <table:table-cell table:formula="of:=ABS((([.K29]-[.J29])/[.J29])*100)" office:value-type="float" office:value="0.697155605130996" calcext:value-type="float">
            <text:p>0,7</text:p>
          </table:table-cell>
          <table:table-cell table:formula="of:=ABS((([.L29]-[.J29])/[.J29])*100)" office:value-type="float" office:value="11.349693251534" calcext:value-type="float">
            <text:p>11,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721" calcext:value-type="float">
            <text:p>0,721</text:p>
          </table:table-cell>
          <table:table-cell table:style-name="ce1" office:value-type="float" office:value="0.3618" calcext:value-type="float">
            <text:p>0,362</text:p>
          </table:table-cell>
          <table:table-cell table:style-name="ce1" office:value-type="float" office:value="0.5276" calcext:value-type="float">
            <text:p>0,528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0]/(22*16.3)" office:value-type="float" office:value="0.00100892359174568" calcext:value-type="float">
            <text:p>0,0010</text:p>
          </table:table-cell>
          <table:table-cell table:formula="of:=[.F30]/(22*16.3)" office:value-type="float" office:value="0.0014712771890686" calcext:value-type="float">
            <text:p>0,00147</text:p>
          </table:table-cell>
          <table:table-cell table:formula="of:=ABS((([.K30]-[.J30])/[.J30])*100)" office:value-type="float" office:value="0.892359174567989" calcext:value-type="float">
            <text:p>0,9</text:p>
          </table:table-cell>
          <table:table-cell table:formula="of:=ABS((([.L30]-[.J30])/[.J30])*100)" office:value-type="float" office:value="47.12771890686" calcext:value-type="float">
            <text:p>47,1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614" calcext:value-type="float">
            <text:p>0,614</text:p>
          </table:table-cell>
          <table:table-cell table:style-name="ce1" office:value-type="float" office:value="0.3545" calcext:value-type="float">
            <text:p>0,355</text:p>
          </table:table-cell>
          <table:table-cell table:style-name="ce1" office:value-type="float" office:value="0.6844" calcext:value-type="float">
            <text:p>0,684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1]/(22*16.3)" office:value-type="float" office:value="0.00098856664807585" calcext:value-type="float">
            <text:p>0,0010</text:p>
          </table:table-cell>
          <table:table-cell table:formula="of:=[.F31]/(22*16.3)" office:value-type="float" office:value="0.0019085331846068" calcext:value-type="float">
            <text:p>0,00191</text:p>
          </table:table-cell>
          <table:table-cell table:formula="of:=ABS((([.K31]-[.J31])/[.J31])*100)" office:value-type="float" office:value="1.14333519241501" calcext:value-type="float">
            <text:p>1,1</text:p>
          </table:table-cell>
          <table:table-cell table:formula="of:=ABS((([.L31]-[.J31])/[.J31])*100)" office:value-type="float" office:value="90.85331846068" calcext:value-type="float">
            <text:p>90,9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0.913" calcext:value-type="float">
            <text:p>0,913</text:p>
          </table:table-cell>
          <table:table-cell table:style-name="ce6" office:value-type="float" office:value="0.3598" calcext:value-type="float">
            <text:p>0,3598</text:p>
          </table:table-cell>
          <table:table-cell table:style-name="ce6" office:value-type="float" office:value="0.4392" calcext:value-type="float">
            <text:p>0,4392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2]/(22*16.3)" office:value-type="float" office:value="0.00100334634690463" calcext:value-type="float">
            <text:p>0,0010</text:p>
          </table:table-cell>
          <table:table-cell table:formula="of:=[.F32]/(22*16.3)" office:value-type="float" office:value="0.00122476296709426" calcext:value-type="float">
            <text:p>0,00122</text:p>
          </table:table-cell>
          <table:table-cell table:formula="of:=ABS((([.K32]-[.J32])/[.J32])*100)" office:value-type="float" office:value="0.334634690463001" calcext:value-type="float">
            <text:p>0,3</text:p>
          </table:table-cell>
          <table:table-cell table:formula="of:=ABS((([.L32]-[.J32])/[.J32])*100)" office:value-type="float" office:value="22.476296709426" calcext:value-type="float">
            <text:p>22,5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1.802" calcext:value-type="float">
            <text:p>1,802</text:p>
          </table:table-cell>
          <table:table-cell table:style-name="ce1" office:value-type="float" office:value="0.3706" calcext:value-type="float">
            <text:p>0,371</text:p>
          </table:table-cell>
          <table:table-cell table:style-name="ce1" office:value-type="float" office:value="0.2482" calcext:value-type="float">
            <text:p>0,248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3]/(22*16.3)" office:value-type="float" office:value="0.00103346346904629" calcext:value-type="float">
            <text:p>0,0010</text:p>
          </table:table-cell>
          <table:table-cell table:formula="of:=[.F33]/(22*16.3)" office:value-type="float" office:value="0.000692136084774122" calcext:value-type="float">
            <text:p>0,00069</text:p>
          </table:table-cell>
          <table:table-cell table:formula="of:=ABS((([.K33]-[.J33])/[.J33])*100)" office:value-type="float" office:value="3.34634690462899" calcext:value-type="float">
            <text:p>3,3</text:p>
          </table:table-cell>
          <table:table-cell table:formula="of:=ABS((([.L33]-[.J33])/[.J33])*100)" office:value-type="float" office:value="30.7863915225878" calcext:value-type="float">
            <text:p>30,8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2.794" calcext:value-type="float">
            <text:p>2,794</text:p>
          </table:table-cell>
          <table:table-cell table:style-name="ce1" office:value-type="float" office:value="0.3465" calcext:value-type="float">
            <text:p>0,347</text:p>
          </table:table-cell>
          <table:table-cell table:style-name="ce1" office:value-type="float" office:value="0.1593" calcext:value-type="float">
            <text:p>0,159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4]/(22*16.3)" office:value-type="float" office:value="0.000966257668711656" calcext:value-type="float">
            <text:p>0,0010</text:p>
          </table:table-cell>
          <table:table-cell table:formula="of:=[.F34]/(22*16.3)" office:value-type="float" office:value="0.000444227551589515" calcext:value-type="float">
            <text:p>0,00044</text:p>
          </table:table-cell>
          <table:table-cell table:formula="of:=ABS((([.K34]-[.J34])/[.J34])*100)" office:value-type="float" office:value="3.3742331288344" calcext:value-type="float">
            <text:p>3,4</text:p>
          </table:table-cell>
          <table:table-cell table:formula="of:=ABS((([.L34]-[.J34])/[.J34])*100)" office:value-type="float" office:value="55.5772448410485" calcext:value-type="float">
            <text:p>55,6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4.08" calcext:value-type="float">
            <text:p>4,080</text:p>
          </table:table-cell>
          <table:table-cell table:style-name="ce6" office:value-type="float" office:value="0.3281" calcext:value-type="float">
            <text:p>0,3281</text:p>
          </table:table-cell>
          <table:table-cell table:style-name="ce6" office:value-type="float" office:value="0.1093" calcext:value-type="float">
            <text:p>0,109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5]/(22*16.3)" office:value-type="float" office:value="0.00091494701617401" calcext:value-type="float">
            <text:p>0,0009</text:p>
          </table:table-cell>
          <table:table-cell table:formula="of:=[.F35]/(22*16.3)" office:value-type="float" office:value="0.000304796430563302" calcext:value-type="float">
            <text:p>0,00030</text:p>
          </table:table-cell>
          <table:table-cell table:formula="of:=ABS((([.K35]-[.J35])/[.J35])*100)" office:value-type="float" office:value="8.505298382599" calcext:value-type="float">
            <text:p>8,5</text:p>
          </table:table-cell>
          <table:table-cell table:formula="of:=ABS((([.L35]-[.J35])/[.J35])*100)" office:value-type="float" office:value="69.5203569436698" calcext:value-type="float">
            <text:p>69,5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5.61" calcext:value-type="float">
            <text:p>5,610</text:p>
          </table:table-cell>
          <table:table-cell table:style-name="ce1" office:value-type="float" office:value="0.3822" calcext:value-type="float">
            <text:p>0,382</text:p>
          </table:table-cell>
          <table:table-cell table:style-name="ce1" office:value-type="float" office:value="0.0766" calcext:value-type="float">
            <text:p>0,077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6]/(22*16.3)" office:value-type="float" office:value="0.00106581148912437" calcext:value-type="float">
            <text:p>0,0011</text:p>
          </table:table-cell>
          <table:table-cell table:formula="of:=[.F36]/(22*16.3)" office:value-type="float" office:value="0.000213608477412158" calcext:value-type="float">
            <text:p>0,00021</text:p>
          </table:table-cell>
          <table:table-cell table:formula="of:=ABS((([.K36]-[.J36])/[.J36])*100)" office:value-type="float" office:value="6.58114891243699" calcext:value-type="float">
            <text:p>6,6</text:p>
          </table:table-cell>
          <table:table-cell table:formula="of:=ABS((([.L36]-[.J36])/[.J36])*100)" office:value-type="float" office:value="78.6391522587842" calcext:value-type="float">
            <text:p>78,6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8.24" calcext:value-type="float">
            <text:p>8,240</text:p>
          </table:table-cell>
          <table:table-cell table:style-name="ce1" office:value-type="float" office:value="0.3915" calcext:value-type="float">
            <text:p>0,392</text:p>
          </table:table-cell>
          <table:table-cell table:style-name="ce1" office:value-type="float" office:value="0.0534" calcext:value-type="float">
            <text:p>0,05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7]/(22*16.3)" office:value-type="float" office:value="0.00109174567763525" calcext:value-type="float">
            <text:p>0,0011</text:p>
          </table:table-cell>
          <table:table-cell table:formula="of:=[.F37]/(22*16.3)" office:value-type="float" office:value="0.000148912437255996" calcext:value-type="float">
            <text:p>0,00015</text:p>
          </table:table-cell>
          <table:table-cell table:formula="of:=ABS((([.K37]-[.J37])/[.J37])*100)" office:value-type="float" office:value="9.17456776352501" calcext:value-type="float">
            <text:p>9,2</text:p>
          </table:table-cell>
          <table:table-cell table:formula="of:=ABS((([.L37]-[.J37])/[.J37])*100)" office:value-type="float" office:value="85.1087562744004" calcext:value-type="float">
            <text:p>85,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/>
          <table:table-cell table:style-name="ce1" office:value-type="float" office:value="8.38" calcext:value-type="float">
            <text:p>8,380</text:p>
          </table:table-cell>
          <table:table-cell table:style-name="ce6" office:value-type="float" office:value="0.307" calcext:value-type="float">
            <text:p>0,3070</text:p>
          </table:table-cell>
          <table:table-cell table:style-name="ce6" office:value-type="float" office:value="0.0353" calcext:value-type="float">
            <text:p>0,0353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2"/>
          <table:table-cell office:value-type="float" office:value="0.001" calcext:value-type="float">
            <text:p>0,001</text:p>
          </table:table-cell>
          <table:table-cell table:formula="of:=[.E38]/(22*16.3)" office:value-type="float" office:value="0.000856107083100948" calcext:value-type="float">
            <text:p>0,0009</text:p>
          </table:table-cell>
          <table:table-cell table:formula="of:=[.F38]/(22*16.3)" office:value-type="float" office:value="0.0000984383714445064" calcext:value-type="float">
            <text:p>0,00010</text:p>
          </table:table-cell>
          <table:table-cell table:formula="of:=ABS((([.K38]-[.J38])/[.J38])*100)" office:value-type="float" office:value="14.3892916899052" calcext:value-type="float">
            <text:p>14,4</text:p>
          </table:table-cell>
          <table:table-cell table:formula="of:=ABS((([.L38]-[.J38])/[.J38])*100)" office:value-type="float" office:value="90.1561628555494" calcext:value-type="float">
            <text:p>90,2</text:p>
          </table:table-cell>
        </table:table-row>
        <table:table-row table:style-name="ro2">
          <table:table-cell/>
          <table:table-cell table:style-name="ce4" table:number-columns-repeated="5"/>
          <table:table-cell/>
          <table:table-cell table:style-name="ce1" table:number-columns-repeated="2"/>
          <table:table-cell/>
          <table:table-cell table:style-name="ce9"/>
          <table:table-cell table:style-name="ce10"/>
          <table:table-cell table:style-name="ce19"/>
          <table:table-cell table:style-name="ce20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rga RC paralelo alta capac" table:style-name="ta1">
        <table:table-column table:style-name="co9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6"/>
        <table:table-column table:style-name="co1" table:default-cell-style-name="ce2"/>
        <table:table-column table:style-name="co10" table:default-cell-style-name="ce1"/>
        <table:table-column table:style-name="co13" table:default-cell-style-name="ce1"/>
        <table:table-column table:style-name="co6" table:default-cell-style-name="Default"/>
        <table:table-column table:style-name="co11" table:default-cell-style-name="ce6"/>
        <table:table-column table:style-name="co12" table:default-cell-style-name="ce6"/>
        <table:table-column table:style-name="co1" table:number-columns-repeated="2" table:default-cell-style-name="ce15"/>
        <table:table-row table:style-name="ro1">
          <table:table-cell office:value-type="string" calcext:value-type="string">
            <text:p>frequencia</text:p>
          </table:table-cell>
          <table:table-cell table:style-name="ce4" office:value-type="string" calcext:value-type="string">
            <text:p>tensao </text:p>
            <text:p>sobre a </text:p>
            <text:p>Carga</text:p>
            <text:p>Ganho</text:p>
          </table:table-cell>
          <table:table-cell table:style-name="ce4" office:value-type="string" calcext:value-type="string">
            <text:p>tensao </text:p>
            <text:p>sobre a </text:p>
            <text:p>Carga</text:p>
            <text:p>SEM ganho</text:p>
          </table:table-cell>
          <table:table-cell table:style-name="ce4" office:value-type="string" calcext:value-type="string">
            <text:p>tensao </text:p>
            <text:p>saida </text:p>
            <text:p>Sistema de ganho</text:p>
          </table:table-cell>
          <table:table-cell table:style-name="ce4" office:value-type="string" calcext:value-type="string">
            <text:p>V_INA </text:p>
            <text:p> Ganho</text:p>
          </table:table-cell>
          <table:table-cell table:style-name="ce4" office:value-type="string" calcext:value-type="string">
            <text:p>V_INA </text:p>
            <text:p>SEM ganho</text:p>
          </table:table-cell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 table:number-columns-spanned="2" table:number-rows-spanned="1">
            <text:p>carga (R//C)</text:p>
          </table:table-cell>
          <table:covered-table-cell table:style-name="Default"/>
          <table:table-cell office:value-type="string" calcext:value-type="string">
            <text:p>corrente esperada</text:p>
          </table:table-cell>
          <table:table-cell table:style-name="ce4" office:value-type="string" calcext:value-type="string">
            <text:p>Corrente (INA)</text:p>
            <text:p>Ganho</text:p>
          </table:table-cell>
          <table:table-cell table:style-name="ce4" office:value-type="string" calcext:value-type="string">
            <text:p>Corrente (INA)</text:p>
            <text:p>Sem ganho</text:p>
          </table:table-cell>
          <table:table-cell table:style-name="ce4" office:value-type="string" calcext:value-type="string">
            <text:p>ERRO(%)</text:p>
            <text:p>Ganho</text:p>
          </table:table-cell>
          <table:table-cell table:style-name="ce4" office:value-type="string" calcext:value-type="string">
            <text:p>ERRO(%)</text:p>
            <text:p>SEM ganh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35" calcext:value-type="float">
            <text:p>1,035</text:p>
          </table:table-cell>
          <table:table-cell office:value-type="float" office:value="0.3585" calcext:value-type="float">
            <text:p>0,3585</text:p>
          </table:table-cell>
          <table:table-cell office:value-type="float" office:value="0.353" calcext:value-type="float">
            <text:p>0,3530</text:p>
          </table:table-cell>
          <table:table-cell office:value-type="float" office:value="0" calcext:value-type="float">
            <text:p>0,00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C</text:p>
          </table:table-cell>
          <table:table-cell office:value-type="float" office:value="0.001" calcext:value-type="float">
            <text:p>0,001</text:p>
          </table:table-cell>
          <table:table-cell table:formula="of:=[.E2]/(22*16.3)" office:value-type="float" office:value="0.000999721137757948" calcext:value-type="float">
            <text:p>0,0010</text:p>
          </table:table-cell>
          <table:table-cell table:formula="of:=[.F2]/(22*16.3)" office:value-type="float" office:value="0.000984383714445064" calcext:value-type="float">
            <text:p>0,0010</text:p>
          </table:table-cell>
          <table:table-cell table:formula="of:=ABS((([.K2]-[.J2])/[.J2])*100)" office:value-type="float" office:value="0.0278862242052104" calcext:value-type="float">
            <text:p>0,0</text:p>
          </table:table-cell>
          <table:table-cell table:formula="of:=ABS((([.L2]-[.J2])/[.J2])*100)" office:value-type="float" office:value="1.5616285554936" calcext:value-type="float">
            <text:p>1,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999" calcext:value-type="float">
            <text:p>0,999</text:p>
          </table:table-cell>
          <table:table-cell table:style-name="ce1" office:value-type="float" office:value="0.3731" calcext:value-type="float">
            <text:p>0,373</text:p>
          </table:table-cell>
          <table:table-cell table:style-name="ce1" office:value-type="float" office:value="0.3633" calcext:value-type="float">
            <text:p>0,363</text:p>
          </table:table-cell>
          <table:table-cell office:value-type="float" office:value="0" calcext:value-type="float">
            <text:p>0,0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100n</text:p>
          </table:table-cell>
          <table:table-cell office:value-type="float" office:value="0.001" calcext:value-type="float">
            <text:p>0,001</text:p>
          </table:table-cell>
          <table:table-cell table:formula="of:=[.E3]/(22*16.3)" office:value-type="float" office:value="0.0010404350250976" calcext:value-type="float">
            <text:p>0,0010</text:p>
          </table:table-cell>
          <table:table-cell table:formula="of:=[.F3]/(22*16.3)" office:value-type="float" office:value="0.00101310652537646" calcext:value-type="float">
            <text:p>0,0010</text:p>
          </table:table-cell>
          <table:table-cell table:formula="of:=ABS((([.K3]-[.J3])/[.J3])*100)" office:value-type="float" office:value="4.04350250975999" calcext:value-type="float">
            <text:p>4,0</text:p>
          </table:table-cell>
          <table:table-cell table:formula="of:=ABS((([.L3]-[.J3])/[.J3])*100)" office:value-type="float" office:value="1.31065253764599" calcext:value-type="float">
            <text:p>1,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06" calcext:value-type="float">
            <text:p>1,006</text:p>
          </table:table-cell>
          <table:table-cell office:value-type="float" office:value="0.35" calcext:value-type="float">
            <text:p>0,3500</text:p>
          </table:table-cell>
          <table:table-cell office:value-type="float" office:value="0.3653" calcext:value-type="float">
            <text:p>0,365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4]/(22*16.3)" office:value-type="float" office:value="0.000976017847183491" calcext:value-type="float">
            <text:p>0,0010</text:p>
          </table:table-cell>
          <table:table-cell table:formula="of:=[.F4]/(22*16.3)" office:value-type="float" office:value="0.00101868377021751" calcext:value-type="float">
            <text:p>0,0010</text:p>
          </table:table-cell>
          <table:table-cell table:formula="of:=ABS((([.K4]-[.J4])/[.J4])*100)" office:value-type="float" office:value="2.3982152816509" calcext:value-type="float">
            <text:p>2,4</text:p>
          </table:table-cell>
          <table:table-cell table:formula="of:=ABS((([.L4]-[.J4])/[.J4])*100)" office:value-type="float" office:value="1.868377021751" calcext:value-type="float">
            <text:p>1,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11" calcext:value-type="float">
            <text:p>1,011</text:p>
          </table:table-cell>
          <table:table-cell table:style-name="ce1" office:value-type="float" office:value="0.3776" calcext:value-type="float">
            <text:p>0,378</text:p>
          </table:table-cell>
          <table:table-cell table:style-name="ce1"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5]/(22*16.3)" office:value-type="float" office:value="0.00105298382598996" calcext:value-type="float">
            <text:p>0,0011</text:p>
          </table:table-cell>
          <table:table-cell table:formula="of:=[.F5]/(22*16.3)" office:value-type="float" office:value="0.00102147239263804" calcext:value-type="float">
            <text:p>0,0010</text:p>
          </table:table-cell>
          <table:table-cell table:formula="of:=ABS((([.K5]-[.J5])/[.J5])*100)" office:value-type="float" office:value="5.298382598996" calcext:value-type="float">
            <text:p>5,3</text:p>
          </table:table-cell>
          <table:table-cell table:formula="of:=ABS((([.L5]-[.J5])/[.J5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09" calcext:value-type="float">
            <text:p>1,009</text:p>
          </table:table-cell>
          <table:table-cell office:value-type="float" office:value="0.3781" calcext:value-type="float">
            <text:p>0,3781</text:p>
          </table:table-cell>
          <table:table-cell office:value-type="float" office:value="0.3663" calcext:value-type="float">
            <text:p>0,366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6]/(22*16.3)" office:value-type="float" office:value="0.00105437813720022" calcext:value-type="float">
            <text:p>0,0011</text:p>
          </table:table-cell>
          <table:table-cell table:formula="of:=[.F6]/(22*16.3)" office:value-type="float" office:value="0.00102147239263804" calcext:value-type="float">
            <text:p>0,0010</text:p>
          </table:table-cell>
          <table:table-cell table:formula="of:=ABS((([.K6]-[.J6])/[.J6])*100)" office:value-type="float" office:value="5.437813720022" calcext:value-type="float">
            <text:p>5,4</text:p>
          </table:table-cell>
          <table:table-cell table:formula="of:=ABS((([.L6]-[.J6])/[.J6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13" calcext:value-type="float">
            <text:p>1,013</text:p>
          </table:table-cell>
          <table:table-cell table:style-name="ce1" office:value-type="float" office:value="0.3779" calcext:value-type="float">
            <text:p>0,378</text:p>
          </table:table-cell>
          <table:table-cell table:style-name="ce1" office:value-type="float" office:value="0.3668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7]/(22*16.3)" office:value-type="float" office:value="0.00105382041271612" calcext:value-type="float">
            <text:p>0,0011</text:p>
          </table:table-cell>
          <table:table-cell table:formula="of:=[.F7]/(22*16.3)" office:value-type="float" office:value="0.0010228667038483" calcext:value-type="float">
            <text:p>0,0010</text:p>
          </table:table-cell>
          <table:table-cell table:formula="of:=ABS((([.K7]-[.J7])/[.J7])*100)" office:value-type="float" office:value="5.382041271612" calcext:value-type="float">
            <text:p>5,4</text:p>
          </table:table-cell>
          <table:table-cell table:formula="of:=ABS((([.L7]-[.J7])/[.J7])*100)" office:value-type="float" office:value="2.28667038483" calcext:value-type="float">
            <text:p>2,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Default" office:value-type="float" office:value="1.013" calcext:value-type="float">
            <text:p>1,013</text:p>
          </table:table-cell>
          <table:table-cell office:value-type="float" office:value="0.3518" calcext:value-type="float">
            <text:p>0,3518</text:p>
          </table:table-cell>
          <table:table-cell office:value-type="float" office:value="0.3668" calcext:value-type="float">
            <text:p>0,366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8]/(22*16.3)" office:value-type="float" office:value="0.000981037367540435" calcext:value-type="float">
            <text:p>0,0010</text:p>
          </table:table-cell>
          <table:table-cell table:formula="of:=[.F8]/(22*16.3)" office:value-type="float" office:value="0.0010228667038483" calcext:value-type="float">
            <text:p>0,0010</text:p>
          </table:table-cell>
          <table:table-cell table:formula="of:=ABS((([.K8]-[.J8])/[.J8])*100)" office:value-type="float" office:value="1.89626324595649" calcext:value-type="float">
            <text:p>1,9</text:p>
          </table:table-cell>
          <table:table-cell table:formula="of:=ABS((([.L8]-[.J8])/[.J8])*100)" office:value-type="float" office:value="2.28667038483" calcext:value-type="float">
            <text:p>2,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6" calcext:value-type="float">
            <text:p>1,060</text:p>
          </table:table-cell>
          <table:table-cell table:style-name="ce1" office:value-type="float" office:value="0.3523" calcext:value-type="float">
            <text:p>0,352</text:p>
          </table:table-cell>
          <table:table-cell table:style-name="ce1" office:value-type="float" office:value="0.3671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9]/(22*16.3)" office:value-type="float" office:value="0.000982431678750697" calcext:value-type="float">
            <text:p>0,0010</text:p>
          </table:table-cell>
          <table:table-cell table:formula="of:=[.F9]/(22*16.3)" office:value-type="float" office:value="0.00102370329057446" calcext:value-type="float">
            <text:p>0,0010</text:p>
          </table:table-cell>
          <table:table-cell table:formula="of:=ABS((([.K9]-[.J9])/[.J9])*100)" office:value-type="float" office:value="1.75683212493031" calcext:value-type="float">
            <text:p>1,8</text:p>
          </table:table-cell>
          <table:table-cell table:formula="of:=ABS((([.L9]-[.J9])/[.J9])*100)" office:value-type="float" office:value="2.370329057446" calcext:value-type="float">
            <text:p>2,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044" calcext:value-type="float">
            <text:p>1,044</text:p>
          </table:table-cell>
          <table:table-cell office:value-type="float" office:value="0.3598" calcext:value-type="float">
            <text:p>0,3598</text:p>
          </table:table-cell>
          <table:table-cell office:value-type="float" office:value="0.3671" calcext:value-type="float">
            <text:p>0,367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0]/(22*16.3)" office:value-type="float" office:value="0.00100334634690463" calcext:value-type="float">
            <text:p>0,0010</text:p>
          </table:table-cell>
          <table:table-cell table:formula="of:=[.F10]/(22*16.3)" office:value-type="float" office:value="0.00102370329057446" calcext:value-type="float">
            <text:p>0,0010</text:p>
          </table:table-cell>
          <table:table-cell table:formula="of:=ABS((([.K10]-[.J10])/[.J10])*100)" office:value-type="float" office:value="0.334634690463001" calcext:value-type="float">
            <text:p>0,3</text:p>
          </table:table-cell>
          <table:table-cell table:formula="of:=ABS((([.L10]-[.J10])/[.J10])*100)" office:value-type="float" office:value="2.370329057446" calcext:value-type="float">
            <text:p>2,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Default" office:value-type="float" office:value="1.054" calcext:value-type="float">
            <text:p>1,054</text:p>
          </table:table-cell>
          <table:table-cell table:style-name="ce1" office:value-type="float" office:value="0.3613" calcext:value-type="float">
            <text:p>0,361</text:p>
          </table:table-cell>
          <table:table-cell table:style-name="ce1" office:value-type="float" office:value="0.3671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1]/(22*16.3)" office:value-type="float" office:value="0.00100752928053542" calcext:value-type="float">
            <text:p>0,0010</text:p>
          </table:table-cell>
          <table:table-cell table:formula="of:=[.F11]/(22*16.3)" office:value-type="float" office:value="0.00102370329057446" calcext:value-type="float">
            <text:p>0,0010</text:p>
          </table:table-cell>
          <table:table-cell table:formula="of:=ABS((([.K11]-[.J11])/[.J11])*100)" office:value-type="float" office:value="0.752928053542002" calcext:value-type="float">
            <text:p>0,8</text:p>
          </table:table-cell>
          <table:table-cell table:formula="of:=ABS((([.L11]-[.J11])/[.J11])*100)" office:value-type="float" office:value="2.370329057446" calcext:value-type="float">
            <text:p>2,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147" calcext:value-type="float">
            <text:p>1,147</text:p>
          </table:table-cell>
          <table:table-cell office:value-type="float" office:value="0.3583" calcext:value-type="float">
            <text:p>0,3583</text:p>
          </table:table-cell>
          <table:table-cell office:value-type="float" office:value="0.3671" calcext:value-type="float">
            <text:p>0,367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2]/(22*16.3)" office:value-type="float" office:value="0.000999163413273843" calcext:value-type="float">
            <text:p>0,0010</text:p>
          </table:table-cell>
          <table:table-cell table:formula="of:=[.F12]/(22*16.3)" office:value-type="float" office:value="0.00102370329057446" calcext:value-type="float">
            <text:p>0,0010</text:p>
          </table:table-cell>
          <table:table-cell table:formula="of:=ABS((([.K12]-[.J12])/[.J12])*100)" office:value-type="float" office:value="0.0836586726156961" calcext:value-type="float">
            <text:p>0,1</text:p>
          </table:table-cell>
          <table:table-cell table:formula="of:=ABS((([.L12]-[.J12])/[.J12])*100)" office:value-type="float" office:value="2.370329057446" calcext:value-type="float">
            <text:p>2,4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132" calcext:value-type="float">
            <text:p>1,132</text:p>
          </table:table-cell>
          <table:table-cell table:style-name="ce1" office:value-type="float" office:value="0.3638" calcext:value-type="float">
            <text:p>0,364</text:p>
          </table:table-cell>
          <table:table-cell table:style-name="ce1" office:value-type="float" office:value="0.3671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3]/(22*16.3)" office:value-type="float" office:value="0.00101450083658673" calcext:value-type="float">
            <text:p>0,0010</text:p>
          </table:table-cell>
          <table:table-cell table:formula="of:=[.F13]/(22*16.3)" office:value-type="float" office:value="0.00102370329057446" calcext:value-type="float">
            <text:p>0,0010</text:p>
          </table:table-cell>
          <table:table-cell table:formula="of:=ABS((([.K13]-[.J13])/[.J13])*100)" office:value-type="float" office:value="1.450083658673" calcext:value-type="float">
            <text:p>1,5</text:p>
          </table:table-cell>
          <table:table-cell table:formula="of:=ABS((([.L13]-[.J13])/[.J13])*100)" office:value-type="float" office:value="2.370329057446" calcext:value-type="float">
            <text:p>2,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226" calcext:value-type="float">
            <text:p>1,226</text:p>
          </table:table-cell>
          <table:table-cell office:value-type="float" office:value="0.3598" calcext:value-type="float">
            <text:p>0,3598</text:p>
          </table:table-cell>
          <table:table-cell office:value-type="float" office:value="0.3668" calcext:value-type="float">
            <text:p>0,366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4]/(22*16.3)" office:value-type="float" office:value="0.00100334634690463" calcext:value-type="float">
            <text:p>0,0010</text:p>
          </table:table-cell>
          <table:table-cell table:formula="of:=[.F14]/(22*16.3)" office:value-type="float" office:value="0.0010228667038483" calcext:value-type="float">
            <text:p>0,0010</text:p>
          </table:table-cell>
          <table:table-cell table:formula="of:=ABS((([.K14]-[.J14])/[.J14])*100)" office:value-type="float" office:value="0.334634690463001" calcext:value-type="float">
            <text:p>0,3</text:p>
          </table:table-cell>
          <table:table-cell table:formula="of:=ABS((([.L14]-[.J14])/[.J14])*100)" office:value-type="float" office:value="2.28667038483" calcext:value-type="float">
            <text:p>2,3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332" calcext:value-type="float">
            <text:p>1,332</text:p>
          </table:table-cell>
          <table:table-cell table:style-name="ce1" office:value-type="float" office:value="0.3621" calcext:value-type="float">
            <text:p>0,362</text:p>
          </table:table-cell>
          <table:table-cell table:style-name="ce1" office:value-type="float" office:value="0.3668" calcext:value-type="float">
            <text:p>0,36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5]/(22*16.3)" office:value-type="float" office:value="0.00100976017847183" calcext:value-type="float">
            <text:p>0,0010</text:p>
          </table:table-cell>
          <table:table-cell table:formula="of:=[.F15]/(22*16.3)" office:value-type="float" office:value="0.0010228667038483" calcext:value-type="float">
            <text:p>0,0010</text:p>
          </table:table-cell>
          <table:table-cell table:formula="of:=ABS((([.K15]-[.J15])/[.J15])*100)" office:value-type="float" office:value="0.976017847182991" calcext:value-type="float">
            <text:p>1,0</text:p>
          </table:table-cell>
          <table:table-cell table:formula="of:=ABS((([.L15]-[.J15])/[.J15])*100)" office:value-type="float" office:value="2.28667038483" calcext:value-type="float">
            <text:p>2,3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366" calcext:value-type="float">
            <text:p>1,366</text:p>
          </table:table-cell>
          <table:table-cell office:value-type="float" office:value="0.3583" calcext:value-type="float">
            <text:p>0,3583</text:p>
          </table:table-cell>
          <table:table-cell office:value-type="float" office:value="0.3666" calcext:value-type="float">
            <text:p>0,366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6]/(22*16.3)" office:value-type="float" office:value="0.000999163413273843" calcext:value-type="float">
            <text:p>0,0010</text:p>
          </table:table-cell>
          <table:table-cell table:formula="of:=[.F16]/(22*16.3)" office:value-type="float" office:value="0.00102230897936419" calcext:value-type="float">
            <text:p>0,0010</text:p>
          </table:table-cell>
          <table:table-cell table:formula="of:=ABS((([.K16]-[.J16])/[.J16])*100)" office:value-type="float" office:value="0.0836586726156961" calcext:value-type="float">
            <text:p>0,1</text:p>
          </table:table-cell>
          <table:table-cell table:formula="of:=ABS((([.L16]-[.J16])/[.J16])*100)" office:value-type="float" office:value="2.230897936419" calcext:value-type="float">
            <text:p>2,2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476" calcext:value-type="float">
            <text:p>1,476</text:p>
          </table:table-cell>
          <table:table-cell table:style-name="ce1" office:value-type="float" office:value="0.3593" calcext:value-type="float">
            <text:p>0,359</text:p>
          </table:table-cell>
          <table:table-cell table:style-name="ce1"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7]/(22*16.3)" office:value-type="float" office:value="0.00100195203569437" calcext:value-type="float">
            <text:p>0,0010</text:p>
          </table:table-cell>
          <table:table-cell table:formula="of:=[.F17]/(22*16.3)" office:value-type="float" office:value="0.00102147239263804" calcext:value-type="float">
            <text:p>0,0010</text:p>
          </table:table-cell>
          <table:table-cell table:formula="of:=ABS((([.K17]-[.J17])/[.J17])*100)" office:value-type="float" office:value="0.195203569436993" calcext:value-type="float">
            <text:p>0,2</text:p>
          </table:table-cell>
          <table:table-cell table:formula="of:=ABS((([.L17]-[.J17])/[.J17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641" calcext:value-type="float">
            <text:p>1,641</text:p>
          </table:table-cell>
          <table:table-cell office:value-type="float" office:value="0.3591" calcext:value-type="float">
            <text:p>0,3591</text:p>
          </table:table-cell>
          <table:table-cell office:value-type="float" office:value="0.3663" calcext:value-type="float">
            <text:p>0,366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8]/(22*16.3)" office:value-type="float" office:value="0.00100139431121026" calcext:value-type="float">
            <text:p>0,0010</text:p>
          </table:table-cell>
          <table:table-cell table:formula="of:=[.F18]/(22*16.3)" office:value-type="float" office:value="0.00102147239263804" calcext:value-type="float">
            <text:p>0,0010</text:p>
          </table:table-cell>
          <table:table-cell table:formula="of:=ABS((([.K18]-[.J18])/[.J18])*100)" office:value-type="float" office:value="0.139431121026008" calcext:value-type="float">
            <text:p>0,1</text:p>
          </table:table-cell>
          <table:table-cell table:formula="of:=ABS((([.L18]-[.J18])/[.J18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638" calcext:value-type="float">
            <text:p>1,638</text:p>
          </table:table-cell>
          <table:table-cell table:style-name="ce1" office:value-type="float" office:value="0.357" calcext:value-type="float">
            <text:p>0,357</text:p>
          </table:table-cell>
          <table:table-cell table:style-name="ce1"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19]/(22*16.3)" office:value-type="float" office:value="0.000995538204127161" calcext:value-type="float">
            <text:p>0,0010</text:p>
          </table:table-cell>
          <table:table-cell table:formula="of:=[.F19]/(22*16.3)" office:value-type="float" office:value="0.00102147239263804" calcext:value-type="float">
            <text:p>0,0010</text:p>
          </table:table-cell>
          <table:table-cell table:formula="of:=ABS((([.K19]-[.J19])/[.J19])*100)" office:value-type="float" office:value="0.446179587283908" calcext:value-type="float">
            <text:p>0,4</text:p>
          </table:table-cell>
          <table:table-cell table:formula="of:=ABS((([.L19]-[.J19])/[.J19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1.827" calcext:value-type="float">
            <text:p>1,827</text:p>
          </table:table-cell>
          <table:table-cell office:value-type="float" office:value="0.3565" calcext:value-type="float">
            <text:p>0,3565</text:p>
          </table:table-cell>
          <table:table-cell office:value-type="float" office:value="0.3661" calcext:value-type="float">
            <text:p>0,366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0]/(22*16.3)" office:value-type="float" office:value="0.000994143892916899" calcext:value-type="float">
            <text:p>0,0010</text:p>
          </table:table-cell>
          <table:table-cell table:formula="of:=[.F20]/(22*16.3)" office:value-type="float" office:value="0.00102091466815393" calcext:value-type="float">
            <text:p>0,0010</text:p>
          </table:table-cell>
          <table:table-cell table:formula="of:=ABS((([.K20]-[.J20])/[.J20])*100)" office:value-type="float" office:value="0.585610708310111" calcext:value-type="float">
            <text:p>0,6</text:p>
          </table:table-cell>
          <table:table-cell table:formula="of:=ABS((([.L20]-[.J20])/[.J20])*100)" office:value-type="float" office:value="2.09146681539299" calcext:value-type="float">
            <text:p>2,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2.897" calcext:value-type="float">
            <text:p>2,897</text:p>
          </table:table-cell>
          <table:table-cell table:style-name="ce1" office:value-type="float" office:value="0.3545" calcext:value-type="float">
            <text:p>0,355</text:p>
          </table:table-cell>
          <table:table-cell table:style-name="ce1" office:value-type="float" office:value="0.3663" calcext:value-type="float">
            <text:p>0,36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1]/(22*16.3)" office:value-type="float" office:value="0.00098856664807585" calcext:value-type="float">
            <text:p>0,0010</text:p>
          </table:table-cell>
          <table:table-cell table:formula="of:=[.F21]/(22*16.3)" office:value-type="float" office:value="0.00102147239263804" calcext:value-type="float">
            <text:p>0,0010</text:p>
          </table:table-cell>
          <table:table-cell table:formula="of:=ABS((([.K21]-[.J21])/[.J21])*100)" office:value-type="float" office:value="1.14333519241501" calcext:value-type="float">
            <text:p>1,1</text:p>
          </table:table-cell>
          <table:table-cell table:formula="of:=ABS((([.L21]-[.J21])/[.J21])*100)" office:value-type="float" office:value="2.14723926380399" calcext:value-type="float">
            <text:p>2,1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4.82" calcext:value-type="float">
            <text:p>4,820</text:p>
          </table:table-cell>
          <table:table-cell office:value-type="float" office:value="0.3533" calcext:value-type="float">
            <text:p>0,3533</text:p>
          </table:table-cell>
          <table:table-cell office:value-type="float" office:value="0.3673" calcext:value-type="float">
            <text:p>0,367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2]/(22*16.3)" office:value-type="float" office:value="0.000985220301171221" calcext:value-type="float">
            <text:p>0,0010</text:p>
          </table:table-cell>
          <table:table-cell table:formula="of:=[.F22]/(22*16.3)" office:value-type="float" office:value="0.00102426101505856" calcext:value-type="float">
            <text:p>0,0010</text:p>
          </table:table-cell>
          <table:table-cell table:formula="of:=ABS((([.K22]-[.J22])/[.J22])*100)" office:value-type="float" office:value="1.47796988287791" calcext:value-type="float">
            <text:p>1,5</text:p>
          </table:table-cell>
          <table:table-cell table:formula="of:=ABS((([.L22]-[.J22])/[.J22])*100)" office:value-type="float" office:value="2.42610150585599" calcext:value-type="float">
            <text:p>2,4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4.83" calcext:value-type="float">
            <text:p>4,830</text:p>
          </table:table-cell>
          <table:table-cell table:style-name="ce1" office:value-type="float" office:value="0.3533" calcext:value-type="float">
            <text:p>0,353</text:p>
          </table:table-cell>
          <table:table-cell table:style-name="ce1" office:value-type="float" office:value="0.3686" calcext:value-type="float">
            <text:p>0,36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3]/(22*16.3)" office:value-type="float" office:value="0.000985220301171221" calcext:value-type="float">
            <text:p>0,0010</text:p>
          </table:table-cell>
          <table:table-cell table:formula="of:=[.F23]/(22*16.3)" office:value-type="float" office:value="0.00102788622420524" calcext:value-type="float">
            <text:p>0,0010</text:p>
          </table:table-cell>
          <table:table-cell table:formula="of:=ABS((([.K23]-[.J23])/[.J23])*100)" office:value-type="float" office:value="1.47796988287791" calcext:value-type="float">
            <text:p>1,5</text:p>
          </table:table-cell>
          <table:table-cell table:formula="of:=ABS((([.L23]-[.J23])/[.J23])*100)" office:value-type="float" office:value="2.78862242052401" calcext:value-type="float">
            <text:p>2,8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22" calcext:value-type="float">
            <text:p>7,220</text:p>
          </table:table-cell>
          <table:table-cell office:value-type="float" office:value="0.3543" calcext:value-type="float">
            <text:p>0,3543</text:p>
          </table:table-cell>
          <table:table-cell office:value-type="float" office:value="0.3706" calcext:value-type="float">
            <text:p>0,370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4]/(22*16.3)" office:value-type="float" office:value="0.000988008923591746" calcext:value-type="float">
            <text:p>0,0010</text:p>
          </table:table-cell>
          <table:table-cell table:formula="of:=[.F24]/(22*16.3)" office:value-type="float" office:value="0.00103346346904629" calcext:value-type="float">
            <text:p>0,0010</text:p>
          </table:table-cell>
          <table:table-cell table:formula="of:=ABS((([.K24]-[.J24])/[.J24])*100)" office:value-type="float" office:value="1.19910764082541" calcext:value-type="float">
            <text:p>1,2</text:p>
          </table:table-cell>
          <table:table-cell table:formula="of:=ABS((([.L24]-[.J24])/[.J24])*100)" office:value-type="float" office:value="3.34634690462899" calcext:value-type="float">
            <text:p>3,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26" calcext:value-type="float">
            <text:p>7,260</text:p>
          </table:table-cell>
          <table:table-cell table:style-name="ce1" office:value-type="float" office:value="0.3583" calcext:value-type="float">
            <text:p>0,358</text:p>
          </table:table-cell>
          <table:table-cell table:style-name="ce1" office:value-type="float" office:value="0.3731" calcext:value-type="float">
            <text:p>0,37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5]/(22*16.3)" office:value-type="float" office:value="0.000999163413273843" calcext:value-type="float">
            <text:p>0,0010</text:p>
          </table:table-cell>
          <table:table-cell table:formula="of:=[.F25]/(22*16.3)" office:value-type="float" office:value="0.0010404350250976" calcext:value-type="float">
            <text:p>0,0010</text:p>
          </table:table-cell>
          <table:table-cell table:formula="of:=ABS((([.K25]-[.J25])/[.J25])*100)" office:value-type="float" office:value="0.0836586726156961" calcext:value-type="float">
            <text:p>0,1</text:p>
          </table:table-cell>
          <table:table-cell table:formula="of:=ABS((([.L25]-[.J25])/[.J25])*100)" office:value-type="float" office:value="4.04350250975999" calcext:value-type="float">
            <text:p>4,0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19" calcext:value-type="float">
            <text:p>7,190</text:p>
          </table:table-cell>
          <table:table-cell office:value-type="float" office:value="0.3596" calcext:value-type="float">
            <text:p>0,3596</text:p>
          </table:table-cell>
          <table:table-cell office:value-type="float" office:value="0.3774" calcext:value-type="float">
            <text:p>0,377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6]/(22*16.3)" office:value-type="float" office:value="0.00100278862242052" calcext:value-type="float">
            <text:p>0,0010</text:p>
          </table:table-cell>
          <table:table-cell table:formula="of:=[.F26]/(22*16.3)" office:value-type="float" office:value="0.00105242610150586" calcext:value-type="float">
            <text:p>0,0011</text:p>
          </table:table-cell>
          <table:table-cell table:formula="of:=ABS((([.K26]-[.J26])/[.J26])*100)" office:value-type="float" office:value="0.278862242051995" calcext:value-type="float">
            <text:p>0,3</text:p>
          </table:table-cell>
          <table:table-cell table:formula="of:=ABS((([.L26]-[.J26])/[.J26])*100)" office:value-type="float" office:value="5.24261015058599" calcext:value-type="float">
            <text:p>5,2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16" calcext:value-type="float">
            <text:p>7,160</text:p>
          </table:table-cell>
          <table:table-cell table:style-name="ce1" office:value-type="float" office:value="0.3696" calcext:value-type="float">
            <text:p>0,370</text:p>
          </table:table-cell>
          <table:table-cell table:style-name="ce1" office:value-type="float" office:value="0.3804" calcext:value-type="float">
            <text:p>0,380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7]/(22*16.3)" office:value-type="float" office:value="0.00103067484662577" calcext:value-type="float">
            <text:p>0,0010</text:p>
          </table:table-cell>
          <table:table-cell table:formula="of:=[.F27]/(22*16.3)" office:value-type="float" office:value="0.00106079196876743" calcext:value-type="float">
            <text:p>0,0011</text:p>
          </table:table-cell>
          <table:table-cell table:formula="of:=ABS((([.K27]-[.J27])/[.J27])*100)" office:value-type="float" office:value="3.067484662577" calcext:value-type="float">
            <text:p>3,1</text:p>
          </table:table-cell>
          <table:table-cell table:formula="of:=ABS((([.L27]-[.J27])/[.J27])*100)" office:value-type="float" office:value="6.07919687674299" calcext:value-type="float">
            <text:p>6,1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31" calcext:value-type="float">
            <text:p>7,310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3844" calcext:value-type="float">
            <text:p>0,384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8]/(22*16.3)" office:value-type="float" office:value="0.00104545454545455" calcext:value-type="float">
            <text:p>0,0010</text:p>
          </table:table-cell>
          <table:table-cell table:formula="of:=[.F28]/(22*16.3)" office:value-type="float" office:value="0.00107194645844953" calcext:value-type="float">
            <text:p>0,0011</text:p>
          </table:table-cell>
          <table:table-cell table:formula="of:=ABS((([.K28]-[.J28])/[.J28])*100)" office:value-type="float" office:value="4.54545454545499" calcext:value-type="float">
            <text:p>4,5</text:p>
          </table:table-cell>
          <table:table-cell table:formula="of:=ABS((([.L28]-[.J28])/[.J28])*100)" office:value-type="float" office:value="7.19464584495299" calcext:value-type="float">
            <text:p>7,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21" calcext:value-type="float">
            <text:p>7,210</text:p>
          </table:table-cell>
          <table:table-cell table:style-name="ce1" office:value-type="float" office:value="0.3523" calcext:value-type="float">
            <text:p>0,352</text:p>
          </table:table-cell>
          <table:table-cell table:style-name="ce1" office:value-type="float" office:value="0.3889" calcext:value-type="float">
            <text:p>0,38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29]/(22*16.3)" office:value-type="float" office:value="0.000982431678750697" calcext:value-type="float">
            <text:p>0,0010</text:p>
          </table:table-cell>
          <table:table-cell table:formula="of:=[.F29]/(22*16.3)" office:value-type="float" office:value="0.00108449525934189" calcext:value-type="float">
            <text:p>0,0011</text:p>
          </table:table-cell>
          <table:table-cell table:formula="of:=ABS((([.K29]-[.J29])/[.J29])*100)" office:value-type="float" office:value="1.75683212493031" calcext:value-type="float">
            <text:p>1,8</text:p>
          </table:table-cell>
          <table:table-cell table:formula="of:=ABS((([.L29]-[.J29])/[.J29])*100)" office:value-type="float" office:value="8.44952593418899" calcext:value-type="float">
            <text:p>8,4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32" calcext:value-type="float">
            <text:p>7,320</text:p>
          </table:table-cell>
          <table:table-cell office:value-type="float" office:value="0.3641" calcext:value-type="float">
            <text:p>0,3641</text:p>
          </table:table-cell>
          <table:table-cell office:value-type="float" office:value="0.4691" calcext:value-type="float">
            <text:p>0,469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0]/(22*16.3)" office:value-type="float" office:value="0.00101533742331288" calcext:value-type="float">
            <text:p>0,0010</text:p>
          </table:table-cell>
          <table:table-cell table:formula="of:=[.F30]/(22*16.3)" office:value-type="float" office:value="0.00130814277746793" calcext:value-type="float">
            <text:p>0,0013</text:p>
          </table:table-cell>
          <table:table-cell table:formula="of:=ABS((([.K30]-[.J30])/[.J30])*100)" office:value-type="float" office:value="1.533742331288" calcext:value-type="float">
            <text:p>1,5</text:p>
          </table:table-cell>
          <table:table-cell table:formula="of:=ABS((([.L30]-[.J30])/[.J30])*100)" office:value-type="float" office:value="30.814277746793" calcext:value-type="float">
            <text:p>30,8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4" calcext:value-type="float">
            <text:p>7,400</text:p>
          </table:table-cell>
          <table:table-cell table:style-name="ce1" office:value-type="float" office:value="0.3646" calcext:value-type="float">
            <text:p>0,365</text:p>
          </table:table-cell>
          <table:table-cell table:style-name="ce1" office:value-type="float" office:value="0.658" calcext:value-type="float">
            <text:p>0,65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1]/(22*16.3)" office:value-type="float" office:value="0.00101673173452315" calcext:value-type="float">
            <text:p>0,0010</text:p>
          </table:table-cell>
          <table:table-cell table:formula="of:=[.F31]/(22*16.3)" office:value-type="float" office:value="0.00183491355270496" calcext:value-type="float">
            <text:p>0,0018</text:p>
          </table:table-cell>
          <table:table-cell table:formula="of:=ABS((([.K31]-[.J31])/[.J31])*100)" office:value-type="float" office:value="1.67317345231501" calcext:value-type="float">
            <text:p>1,7</text:p>
          </table:table-cell>
          <table:table-cell table:formula="of:=ABS((([.L31]-[.J31])/[.J31])*100)" office:value-type="float" office:value="83.491355270496" calcext:value-type="float">
            <text:p>83,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47" calcext:value-type="float">
            <text:p>7,470</text:p>
          </table:table-cell>
          <table:table-cell office:value-type="float" office:value="0.3731" calcext:value-type="float">
            <text:p>0,3731</text:p>
          </table:table-cell>
          <table:table-cell office:value-type="float" office:value="0.732" calcext:value-type="float">
            <text:p>0,7320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2]/(22*16.3)" office:value-type="float" office:value="0.0010404350250976" calcext:value-type="float">
            <text:p>0,0010</text:p>
          </table:table-cell>
          <table:table-cell table:formula="of:=[.F32]/(22*16.3)" office:value-type="float" office:value="0.00204127161182376" calcext:value-type="float">
            <text:p>0,0020</text:p>
          </table:table-cell>
          <table:table-cell table:formula="of:=ABS((([.K32]-[.J32])/[.J32])*100)" office:value-type="float" office:value="4.04350250975999" calcext:value-type="float">
            <text:p>4,0</text:p>
          </table:table-cell>
          <table:table-cell table:formula="of:=ABS((([.L32]-[.J32])/[.J32])*100)" office:value-type="float" office:value="104.127161182376" calcext:value-type="float">
            <text:p>104,1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64" calcext:value-type="float">
            <text:p>7,640</text:p>
          </table:table-cell>
          <table:table-cell table:style-name="ce1" office:value-type="float" office:value="0.3701" calcext:value-type="float">
            <text:p>0,370</text:p>
          </table:table-cell>
          <table:table-cell table:style-name="ce1" office:value-type="float" office:value="0.43" calcext:value-type="float">
            <text:p>0,430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3]/(22*16.3)" office:value-type="float" office:value="0.00103206915783603" calcext:value-type="float">
            <text:p>0,0010</text:p>
          </table:table-cell>
          <table:table-cell table:formula="of:=[.F33]/(22*16.3)" office:value-type="float" office:value="0.00119910764082543" calcext:value-type="float">
            <text:p>0,0012</text:p>
          </table:table-cell>
          <table:table-cell table:formula="of:=ABS((([.K33]-[.J33])/[.J33])*100)" office:value-type="float" office:value="3.20691578360301" calcext:value-type="float">
            <text:p>3,2</text:p>
          </table:table-cell>
          <table:table-cell table:formula="of:=ABS((([.L33]-[.J33])/[.J33])*100)" office:value-type="float" office:value="19.910764082543" calcext:value-type="float">
            <text:p>19,9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82" calcext:value-type="float">
            <text:p>7,820</text:p>
          </table:table-cell>
          <table:table-cell office:value-type="float" office:value="0.3593" calcext:value-type="float">
            <text:p>0,3593</text:p>
          </table:table-cell>
          <table:table-cell office:value-type="float" office:value="0.2518" calcext:value-type="float">
            <text:p>0,251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4]/(22*16.3)" office:value-type="float" office:value="0.00100195203569437" calcext:value-type="float">
            <text:p>0,0010</text:p>
          </table:table-cell>
          <table:table-cell table:formula="of:=[.F34]/(22*16.3)" office:value-type="float" office:value="0.000702175125488009" calcext:value-type="float">
            <text:p>0,0007</text:p>
          </table:table-cell>
          <table:table-cell table:formula="of:=ABS((([.K34]-[.J34])/[.J34])*100)" office:value-type="float" office:value="0.195203569436993" calcext:value-type="float">
            <text:p>0,2</text:p>
          </table:table-cell>
          <table:table-cell table:formula="of:=ABS((([.L34]-[.J34])/[.J34])*100)" office:value-type="float" office:value="29.7824874511991" calcext:value-type="float">
            <text:p>29,8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7.93" calcext:value-type="float">
            <text:p>7,930</text:p>
          </table:table-cell>
          <table:table-cell table:style-name="ce1" office:value-type="float" office:value="0.3887" calcext:value-type="float">
            <text:p>0,389</text:p>
          </table:table-cell>
          <table:table-cell table:style-name="ce1" office:value-type="float" office:value="0.1643" calcext:value-type="float">
            <text:p>0,16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5]/(22*16.3)" office:value-type="float" office:value="0.00108393753485778" calcext:value-type="float">
            <text:p>0,0011</text:p>
          </table:table-cell>
          <table:table-cell table:formula="of:=[.F35]/(22*16.3)" office:value-type="float" office:value="0.000458170663692136" calcext:value-type="float">
            <text:p>0,0005</text:p>
          </table:table-cell>
          <table:table-cell table:formula="of:=ABS((([.K35]-[.J35])/[.J35])*100)" office:value-type="float" office:value="8.39375348577799" calcext:value-type="float">
            <text:p>8,4</text:p>
          </table:table-cell>
          <table:table-cell table:formula="of:=ABS((([.L35]-[.J35])/[.J35])*100)" office:value-type="float" office:value="54.1829336307864" calcext:value-type="float">
            <text:p>54,2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8.11" calcext:value-type="float">
            <text:p>8,110</text:p>
          </table:table-cell>
          <table:table-cell office:value-type="float" office:value="0.3751" calcext:value-type="float">
            <text:p>0,3751</text:p>
          </table:table-cell>
          <table:table-cell office:value-type="float" office:value="0.1122" calcext:value-type="float">
            <text:p>0,112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6]/(22*16.3)" office:value-type="float" office:value="0.00104601226993865" calcext:value-type="float">
            <text:p>0,0010</text:p>
          </table:table-cell>
          <table:table-cell table:formula="of:=[.F36]/(22*16.3)" office:value-type="float" office:value="0.000312883435582822" calcext:value-type="float">
            <text:p>0,0003</text:p>
          </table:table-cell>
          <table:table-cell table:formula="of:=ABS((([.K36]-[.J36])/[.J36])*100)" office:value-type="float" office:value="4.601226993865" calcext:value-type="float">
            <text:p>4,6</text:p>
          </table:table-cell>
          <table:table-cell table:formula="of:=ABS((([.L36]-[.J36])/[.J36])*100)" office:value-type="float" office:value="68.7116564417178" calcext:value-type="float">
            <text:p>68,7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8.27" calcext:value-type="float">
            <text:p>8,270</text:p>
          </table:table-cell>
          <table:table-cell table:style-name="ce1" office:value-type="float" office:value="0.4153" calcext:value-type="float">
            <text:p>0,415</text:p>
          </table:table-cell>
          <table:table-cell table:style-name="ce1" office:value-type="float" office:value="0.0768" calcext:value-type="float">
            <text:p>0,07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7]/(22*16.3)" office:value-type="float" office:value="0.00115811489124373" calcext:value-type="float">
            <text:p>0,0012</text:p>
          </table:table-cell>
          <table:table-cell table:formula="of:=[.F37]/(22*16.3)" office:value-type="float" office:value="0.000214166201896263" calcext:value-type="float">
            <text:p>0,0002</text:p>
          </table:table-cell>
          <table:table-cell table:formula="of:=ABS((([.K37]-[.J37])/[.J37])*100)" office:value-type="float" office:value="15.811489124373" calcext:value-type="float">
            <text:p>15,8</text:p>
          </table:table-cell>
          <table:table-cell table:formula="of:=ABS((([.L37]-[.J37])/[.J37])*100)" office:value-type="float" office:value="78.5833798103737" calcext:value-type="float">
            <text:p>78,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8.38" calcext:value-type="float">
            <text:p>8,3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0516" calcext:value-type="float">
            <text:p>0,051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E38]/(22*16.3)" office:value-type="float" office:value="0.000669269380925823" calcext:value-type="float">
            <text:p>0,0007</text:p>
          </table:table-cell>
          <table:table-cell table:formula="of:=[.F38]/(22*16.3)" office:value-type="float" office:value="0.000143892916899052" calcext:value-type="float">
            <text:p>0,0001</text:p>
          </table:table-cell>
          <table:table-cell table:formula="of:=ABS((([.K38]-[.J38])/[.J38])*100)" office:value-type="float" office:value="33.0730619074177" calcext:value-type="float">
            <text:p>33,1</text:p>
          </table:table-cell>
          <table:table-cell table:formula="of:=ABS((([.L38]-[.J38])/[.J38])*100)" office:value-type="float" office:value="85.6107083100948" calcext:value-type="float">
            <text:p>85,6</text:p>
          </table:table-cell>
        </table:table-row>
        <table:table-row table:style-name="ro2">
          <table:table-cell/>
          <table:table-cell table:style-name="ce4" table:number-columns-repeated="5"/>
          <table:table-cell table:style-name="Default"/>
          <table:table-cell table:number-columns-repeated="3"/>
          <table:table-cell table:style-name="ce4" table:number-columns-repeated="3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41:06.876224925</meta:creation-date>
    <dc:date>2024-04-26T17:31:09.772300997</dc:date>
    <meta:editing-duration>PT3H4M30S</meta:editing-duration>
    <meta:editing-cycles>16</meta:editing-cycles>
    <meta:generator>LibreOffice/7.3.7.2$Linux_X86_64 LibreOffice_project/30$Build-2</meta:generator>
    <meta:document-statistic meta:table-count="3" meta:cell-count="1269" meta:object-count="0"/>
  </office:meta>
</office:document-meta>
</file>