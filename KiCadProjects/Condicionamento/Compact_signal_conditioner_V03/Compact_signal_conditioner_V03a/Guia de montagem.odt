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26f71" officeooo:paragraph-rsid="00026f71" style:font-weight-asian="bold" style:font-weight-complex="bold"/>
    </style:style>
    <style:style style:name="P2" style:family="paragraph" style:parent-style-name="Standard">
      <style:text-properties officeooo:rsid="00026f71" officeooo:paragraph-rsid="00026f71"/>
    </style:style>
    <style:style style:name="P3" style:family="paragraph" style:parent-style-name="Standard">
      <style:text-properties officeooo:rsid="000afc83" officeooo:paragraph-rsid="000afc83"/>
    </style:style>
    <style:style style:name="P4" style:family="paragraph" style:parent-style-name="Standard" style:list-style-name="L1">
      <style:text-properties officeooo:rsid="000afc83" officeooo:paragraph-rsid="000afc83"/>
    </style:style>
    <style:style style:name="P5" style:family="paragraph" style:parent-style-name="Standard">
      <style:text-properties style:text-underline-style="solid" style:text-underline-width="auto" style:text-underline-color="font-color" officeooo:rsid="00026f71" officeooo:paragraph-rsid="00026f71"/>
    </style:style>
    <style:style style:name="P6" style:family="paragraph">
      <loext:graphic-properties draw:fill="none"/>
    </style:style>
    <style:style style:name="P7" style:family="paragraph">
      <style:paragraph-properties fo:text-align="start" style:text-autospace="none" style:line-break="normal" style:writing-mode="page"/>
      <style:text-properties fo:hyphenate="false"/>
    </style:style>
    <style:style style:name="P8" style:family="paragraph">
      <loext:graphic-properties draw:fill="none" draw:fill-color="#ffffff"/>
    </style:style>
    <style:style style:name="P9" style:family="paragraph" style:parent-style-name="Standard">
      <style:text-properties style:text-underline-style="solid" style:text-underline-width="auto" style:text-underline-color="font-color" officeooo:rsid="00064778" officeooo:paragraph-rsid="00064778"/>
    </style:style>
    <style:style style:name="P10" style:family="paragraph">
      <style:paragraph-properties style:text-autospace="none" style:line-break="normal" style:writing-mode="page"/>
      <style:text-properties fo:hyphenate="false"/>
    </style:style>
    <style:style style:name="P11" style:family="paragraph">
      <loext:graphic-properties draw:fill="none"/>
      <style:text-properties fo:font-size="12pt"/>
    </style:style>
    <style:style style:name="P12" style:family="paragraph" style:parent-style-name="Standard">
      <style:text-properties style:text-underline-style="none" officeooo:rsid="00064778" officeooo:paragraph-rsid="00064778"/>
    </style:style>
    <style:style style:name="P13" style:family="paragraph" style:parent-style-name="Standard">
      <style:text-properties style:text-underline-style="none" officeooo:rsid="000a0689" officeooo:paragraph-rsid="000a0689"/>
    </style:style>
    <style:style style:name="P14" style:family="paragraph" style:parent-style-name="Standard">
      <style:text-properties style:text-underline-style="solid" style:text-underline-width="auto" style:text-underline-color="font-color" officeooo:rsid="000a0689" officeooo:paragraph-rsid="000a0689"/>
    </style:style>
    <style:style style:name="P15" style:family="paragraph">
      <loext:graphic-properties draw:fill="none" draw:fill-color="#ffffff"/>
      <style:text-properties fo:font-size="12pt"/>
    </style:style>
    <style:style style:name="P16" style:family="paragraph" style:parent-style-name="Standard">
      <style:text-properties style:text-underline-style="solid" style:text-underline-width="auto" style:text-underline-color="font-color" officeooo:rsid="0011ffb4" officeooo:paragraph-rsid="00113f46"/>
    </style:style>
    <style:style style:name="T1" style:family="text">
      <style:text-properties officeooo:rsid="0016022a"/>
    </style:style>
    <style:style style:name="T2" style:family="text">
      <style:text-properties officeooo:rsid="001a2b64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0afc83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2pt" fo:font-weight="bold" style:font-weight-asian="bold" style:font-weight-complex="bold"/>
    </style:style>
    <style:style style:name="T9" style:family="text">
      <style:text-properties fo:font-size="12pt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❑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color="#000000" draw:fill="none" draw:textarea-horizontal-align="justify" draw:textarea-vertical-align="middle" draw:auto-grow-height="false" fo:min-height="0.9909in" fo:min-width="3.481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1.052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75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000000" draw:fill="none" draw:textarea-horizontal-align="justify" draw:textarea-vertical-align="middle" draw:auto-grow-height="false" fo:min-height="0.5138in" fo:min-width="3.481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609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color="#000000" draw:fill="none" draw:textarea-horizontal-align="justify" draw:textarea-vertical-align="middle" draw:auto-grow-height="false" fo:min-height="0.8165in" fo:min-width="3.481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000000" draw:fill="none" draw:fill-color="#ffffff" fo:min-height="0.725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color="#000000" draw:fill="none" draw:textarea-horizontal-align="justify" draw:textarea-vertical-align="middle" draw:auto-grow-height="false" fo:min-height="0.5925in" fo:min-width="3.481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000000" draw:fill="none" draw:fill-color="#ffffff" fo:min-height="0.736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4575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svg:stroke-color="#000000" draw:fill="none" draw:textarea-horizontal-align="justify" draw:textarea-vertical-align="middle" draw:auto-grow-height="false" fo:min-height="0.5929in" fo:min-width="3.481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color="#000000" draw:fill="none" draw:textarea-horizontal-align="justify" draw:textarea-vertical-align="middle" draw:auto-grow-height="false" fo:min-height="0.6193in" fo:min-width="3.481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svg:stroke-color="#000000" draw:fill="none" draw:fill-color="#ffffff" fo:min-height="0.54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svg:stroke-color="#000000" draw:fill="none" draw:textarea-horizontal-align="justify" draw:textarea-vertical-align="middle" draw:auto-grow-height="false" fo:min-height="0.689in" fo:min-width="3.481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ia de montagem – Circuito impresso</text:p>
      <text:p text:style-name="P2"/>
      <text:p text:style-name="P2">Modelo da placa: <text:span text:style-name="T1">Condicionamento compacto</text:span><text:tab/> versão: <text:span text:style-name="T1">0</text:span><text:span text:style-name="T2">3</text:span><text:span text:style-name="T1">a</text:span></text:p>
      <text:p text:style-name="P2">Ljcpcb order: _________________________________</text:p>
      <text:p text:style-name="P2">Data: ____/____/____</text:p>
      <text:p text:style-name="P2"/>
      <text:p text:style-name="P3"><text:span text:style-name="T3">Separação de material:</text:span> </text:p>
      <text:section text:style-name="Sect1" text:name="Seção1">
        <text:list text:style-name="L1">
          <text:list-item>
            <text:p text:style-name="P4">Ferro de solda</text:p>
          </text:list-item>
          <text:list-item>
            <text:p text:style-name="P4">estanho</text:p>
          </text:list-item>
          <text:list-item>
            <text:p text:style-name="P4">fluxo para solda</text:p>
          </text:list-item>
          <text:list-item>
            <text:p text:style-name="P4">alicate de corte</text:p>
          </text:list-item>
          <text:list-item>
            <text:p text:style-name="P4">alicate de bico</text:p>
          </text:list-item>
          <text:list-item>
            <text:p text:style-name="P4">alicate universal</text:p>
          </text:list-item>
          <text:list-item>
            <text:p text:style-name="P4">ventilador de mesa</text:p>
          </text:list-item>
          <text:list-item>
            <text:p text:style-name="P4">papel</text:p>
          </text:list-item>
          <text:list-item>
            <text:p text:style-name="P4">álcool isopropílico </text:p>
          </text:list-item>
          <text:list-item>
            <text:p text:style-name="P4">fita dessoldadora </text:p>
          </text:list-item>
          <text:list-item>
            <text:p text:style-name="P4">sugador de solda</text:p>
          </text:list-item>
          <text:list-item>
            <text:p text:style-name="P4">cotonete</text:p>
          </text:list-item>
          <text:list-item>
            <text:p text:style-name="P4">estilete</text:p>
          </text:list-item>
          <text:list-item>
            <text:p text:style-name="P4">lixa</text:p>
          </text:list-item>
        </text:list>
      </text:section>
      <text:p text:style-name="P2"><text:span text:style-name="T3"/></text:p>
      <text:p text:style-name="P2"><text:span text:style-name="T3">Separação de </text:span><text:span text:style-name="T4">componentes</text:span></text:p>
      <text:p text:style-name="P5"><draw:custom-shape text:anchor-type="paragraph" draw:z-index="0" draw:name="Forma 1" draw:style-name="gr1" draw:text-style-name="P6" svg:width="3.4815in" svg:height="0.9913in" svg:x="0.0016in" svg:y="0.0508in"><text:p/><draw:enhanced-geometry svg:viewBox="0 0 21600 21600" draw:type="rectangle" draw:enhanced-path="M 0 0 L 21600 0 21600 21600 0 21600 0 0 Z N"/></draw:custom-shape><draw:frame text:anchor-type="paragraph" draw:z-index="1" draw:name="Quadro de texto 1" draw:style-name="gr2" draw:text-style-name="P8" svg:width="3.8614in" svg:height="1.0531in" svg:x="3.5472in" svg:y="0.0563in"><draw:text-box><text:p><text:span text:style-name="T5">Resistores</text:span> (designador – quantidade - valor)</text:p><text:p text:style-name="P7"><text:span text:style-name="T6"><text:s text:c="3"/></text:span><text:span text:style-name="T6">R1, R8 – 2 – 220</text:span></text:p><text:p text:style-name="P7"><text:span text:style-name="T6"><text:s text:c="3"/></text:span><text:span text:style-name="T6">R2,R3,R4,R5 – 4 – 100k</text:span></text:p><text:p text:style-name="P7"><text:span text:style-name="T7"><text:s text:c="3"/></text:span><text:span text:style-name="T7">Rfg_1,Rfg_2 – 2 - 51k</text:span></text:p><text:p text:style-name="P7"><text:span text:style-name="T6"><text:s text:c="3"/></text:span><text:span text:style-name="T7">RC1,RC2,RC3,RC4,RC5,RC6,RC7,RC8,RC9,RC10 – </text:span><text:span text:style-name="T7">10 – aberto.</text:span></text:p></draw:text-box></draw:frame></text:p>
      <text:p text:style-name="P5"/>
      <text:p text:style-name="P5"/>
      <text:p text:style-name="P5"/>
      <text:p text:style-name="P5"/>
      <text:p text:style-name="P5"><draw:frame text:anchor-type="paragraph" draw:z-index="2" draw:name="Quadro de texto 2" draw:style-name="gr3" draw:text-style-name="P8" svg:width="3.378in" svg:height="0.7524in" svg:x="3.5472in" svg:y="0.1508in"><draw:text-box><text:p><text:span text:style-name="T5">Capacitores</text:span> (designador – quantidade - valor)</text:p><text:p><text:tab/>C1,C4 – 2 – 470p</text:p><text:p><text:tab/>C2,C3 – 2 – 1u</text:p></draw:text-box></draw:frame></text:p>
      <text:p text:style-name="P5"/>
      <text:p text:style-name="P5"/>
      <text:p text:style-name="P5"/>
      <text:p text:style-name="P5"/>
      <text:p text:style-name="P5"><draw:custom-shape text:anchor-type="paragraph" draw:z-index="9" draw:name="Forma 3" draw:style-name="gr4" draw:text-style-name="P6" svg:width="3.4815in" svg:height="0.5142in" svg:x="0.0016in" svg:y="0.1256in"><text:p/><draw:enhanced-geometry svg:viewBox="0 0 21600 21600" draw:type="rectangle" draw:enhanced-path="M 0 0 L 21600 0 21600 21600 0 21600 0 0 Z N"/></draw:custom-shape></text:p>
      <text:p text:style-name="P9"><draw:frame text:anchor-type="paragraph" draw:z-index="10" draw:name="Quadro de texto 9" draw:style-name="gr5" draw:text-style-name="P8" svg:width="3.378in" svg:height="0.6094in" svg:x="3.5228in" svg:y="-0.0827in"><draw:text-box><text:p><text:span text:style-name="T5">Diodos</text:span> (designador – quantidade - valor)</text:p><text:p text:style-name="P10"><text:tab/>D1,D2,D3,D4 – 4 – <text:span text:style-name="T6">1N5819</text:span></text:p></draw:text-box></draw:frame></text:p>
      <text:p text:style-name="P9"/>
      <text:p text:style-name="P9"/>
      <text:p text:style-name="P9"><draw:custom-shape text:anchor-type="paragraph" draw:z-index="5" draw:name="Forma 2" draw:style-name="gr6" draw:text-style-name="P6" svg:width="3.4815in" svg:height="0.8169in" svg:x="0.0016in" svg:y="-1.5827in"><text:p/><draw:enhanced-geometry svg:viewBox="0 0 21600 21600" draw:type="rectangle" draw:enhanced-path="M 0 0 L 21600 0 21600 21600 0 21600 0 0 Z N"/></draw:custom-shape></text:p>
      <text:p text:style-name="P9"><draw:frame text:anchor-type="paragraph" draw:z-index="3" draw:name="Quadro de texto 4" draw:style-name="gr7" draw:text-style-name="P8" svg:width="3.4622in" svg:height="0.7252in" svg:x="3.5472in" svg:y="-0.1744in"><draw:text-box><text:p><text:span text:style-name="T5">CIs</text:span> (designador – quantidade - valor)</text:p><text:p><text:tab/>U1, U2 <text:s/>– <text:s/>2 <text:s/>– <text:s/>soquete 14 (chaves)</text:p><text:p text:style-name="P10"><text:span text:style-name="T7"><text:tab/></text:span><text:span text:style-name="T7">U1-buffer1,U2-gain1,U3-Cond-DIP1 – 3 – soquete 8 (AmpOp)</text:span></text:p></draw:text-box></draw:frame></text:p>
      <text:p text:style-name="P9"/>
      <text:p text:style-name="P9"/>
      <text:p text:style-name="P9"/>
      <text:p text:style-name="P9"><draw:custom-shape text:anchor-type="paragraph" draw:z-index="7" draw:name="Forma 6" draw:style-name="gr8" draw:text-style-name="P6" svg:width="3.4815in" svg:height="0.5925in" svg:x="0.0016in" svg:y="-0.1083in"><text:p/><draw:enhanced-geometry svg:viewBox="0 0 21600 21600" draw:type="rectangle" draw:enhanced-path="M 0 0 L 21600 0 21600 21600 0 21600 0 0 Z N"/></draw:custom-shape><draw:frame text:anchor-type="paragraph" draw:z-index="4" draw:name="Quadro de texto 5" draw:style-name="gr9" draw:text-style-name="P8" svg:width="3.7661in" svg:height="0.737in" svg:x="3.5472in" svg:y="-0.1272in"><draw:text-box><text:p><text:span text:style-name="T5">Barra macho 90º</text:span> (designador – quantidade - valor)</text:p><text:p><text:tab/>J2 – 1 – 02 pinos </text:p><text:p><text:tab/>J8 – 1 – 06 pinos</text:p></draw:text-box></draw:frame></text:p>
      <text:p text:style-name="P9"/>
      <text:p text:style-name="P9"/>
      <text:p text:style-name="P9"><draw:frame text:anchor-type="paragraph" draw:z-index="14" draw:name="Quadro de texto 6" draw:style-name="gr10" draw:text-style-name="P8" svg:width="3.7661in" svg:height="0.4579in" svg:x="3.5827in" svg:y="0.0346in"><draw:text-box><text:p><text:span text:style-name="T5">Barra fêmea 90º</text:span> (designador – quantidade - valor)</text:p><text:p><text:tab/>J5 – 1 – 06 pinos</text:p></draw:text-box></draw:frame><draw:custom-shape text:anchor-type="paragraph" draw:z-index="15" draw:name="Forma 9" draw:style-name="gr11" draw:text-style-name="P11" svg:width="3.4823in" svg:height="0.5933in" svg:x="0.0126in" svg:y="0.0465in"><text:p/><draw:enhanced-geometry svg:viewBox="0 0 21600 21600" draw:type="rectangle" draw:enhanced-path="M 0 0 L 21600 0 21600 21600 0 21600 0 0 Z N"/></draw:custom-shape></text:p>
      <text:p text:style-name="P9"/>
      <text:p text:style-name="P9"><draw:custom-shape text:anchor-type="paragraph" draw:z-index="8" draw:name="Forma 7" draw:style-name="gr12" draw:text-style-name="P6" svg:width="3.4815in" svg:height="0.6197in" svg:x="0.0016in" svg:y="0.3827in"><text:p/><draw:enhanced-geometry svg:viewBox="0 0 21600 21600" draw:type="rectangle" draw:enhanced-path="M 0 0 L 21600 0 21600 21600 0 21600 0 0 Z N"/></draw:custom-shape></text:p>
      <text:p text:style-name="P9"><draw:frame text:anchor-type="paragraph" draw:z-index="11" draw:name="Quadro de texto 10" draw:style-name="gr13" draw:text-style-name="P8" svg:width="3.5571in" svg:height="0.548in" svg:x="3.5709in" svg:y="0.1874in"><draw:text-box><text:p><text:span text:style-name="T5">Barra macho</text:span> (designador – quantidade - valor)</text:p><text:p><text:tab/><text:tab/>J6,J7 – 2 – 03 pinos </text:p></draw:text-box></draw:frame><draw:custom-shape text:anchor-type="paragraph" draw:z-index="13" draw:name="Forma 5" draw:style-name="gr12" draw:text-style-name="P6" svg:width="3.4815in" svg:height="0.6197in" svg:x="0.0016in" svg:y="0.9075in"><text:p/><draw:enhanced-geometry svg:viewBox="0 0 21600 21600" draw:type="rectangle" draw:enhanced-path="M 0 0 L 21600 0 21600 21600 0 21600 0 0 Z N"/></draw:custom-shape></text:p>
      <text:p text:style-name="P9"/>
      <text:p text:style-name="P12"><draw:custom-shape text:anchor-type="paragraph" draw:z-index="6" draw:name="Forma 4" draw:style-name="gr14" draw:text-style-name="P6" svg:width="3.4815in" svg:height="0.6894in" svg:x="0.0016in" svg:y="-2.4618in"><text:p/><draw:enhanced-geometry svg:viewBox="0 0 21600 21600" draw:type="rectangle" draw:enhanced-path="M 0 0 L 21600 0 21600 21600 0 21600 0 0 Z N"/></draw:custom-shape></text:p>
      <text:p text:style-name="P13"/>
      <text:p text:style-name="P14"><draw:frame text:anchor-type="paragraph" draw:z-index="12" draw:name="Quadro de texto 3" draw:style-name="gr9" draw:text-style-name="P15" svg:width="3.7661in" svg:height="0.737in" svg:x="3.6346in" svg:y="0.161in"><draw:text-box><text:p><text:span text:style-name="T8">Barra dupla macho 90º</text:span><text:span text:style-name="T9"> (designador – quantidade - </text:span><text:span text:style-name="T9">valor)</text:span></text:p><text:p><text:span text:style-name="T9"><text:tab/></text:span><text:span text:style-name="T9"><text:tab/></text:span><text:span text:style-name="T9">J1 – 1 – 2x09 pinos</text:span></text:p></draw:text-box></draw:frame></text:p>
      <text:p text:style-name="P14"/>
      <text:p text:style-name="P14"/>
      <text:p text:style-name="P14"/>
      <text:p text:style-name="P14">Número de placas restantes:</text:p>
      <text:p text:style-name="P14"/>
      <text:p text:style-name="P14">Componentes próximos de acabarem:</text:p>
      <text:p text:style-name="P14"/>
      <text:p text:style-name="P16">Componentes que foram substituídos:</text:p>
      <text:p text:style-name="P13"/>
      <text:p text:style-name="P13"><text:span text:style-name="T3">Componentes em falta:</text:span>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font-size="9pt" officeooo:rsid="0007489a" officeooo:paragraph-rsid="0016022a" style:font-size-asian="9pt" style:font-size-complex="9pt"/>
    </style:style>
    <style:style style:name="MT1" style:family="text">
      <style:text-properties officeooo:rsid="0016022a"/>
    </style:style>
    <style:style style:name="MT2" style:family="text">
      <style:text-properties officeooo:rsid="001d153a"/>
    </style:style>
    <style:style style:name="MT3" style:family="text">
      <style:text-properties officeooo:rsid="0008620b"/>
    </style:style>
    <style:style style:name="MT4" style:family="text">
      <style:text-properties officeooo:rsid="0016dcaa"/>
    </style:style>
    <style:page-layout style:name="Mpm1">
      <style:page-layout-properties fo:page-width="8.2681in" fo:page-height="11.6929in" style:num-format="1" style:print-orientation="portrait" fo:margin-top="0.4965in" fo:margin-bottom="0.148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2362in" fo:margin-left="0in" fo:margin-right="0in" fo:margin-bottom="0.1965in" fo:background-color="transparent" style:dynamic-spacing="false" draw:fill="none" draw:fill-color="#729fcf"/>
      </style:header-style>
      <style:footer-style>
        <style:header-footer-properties svg:height="0.3028in" fo:margin-left="0in" fo:margin-right="0in" fo:margin-top="0.1965in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Guia de montagem – <text:span text:style-name="MT1">Condicionamento compacto</text:span> V0<text:span text:style-name="MT2">3</text:span><text:span text:style-name="MT1">a</text:span> - JLCPCB order:______________________ page <text:page-number text:select-page="current">1</text:page-number><text:span text:style-name="MT3">/</text:span><text:span text:style-name="MT4">1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5T10:00:02.777954452</meta:creation-date>
    <dc:date>2025-04-29T20:04:21.403134107</dc:date>
    <meta:editing-duration>PT3H3M31S</meta:editing-duration>
    <meta:editing-cycles>20</meta:editing-cycles>
    <meta:generator>LibreOffice/24.8.2.1$Linux_X86_64 LibreOffice_project/0f794b6e29741098670a3b95d60478a65d05ef13</meta:generator>
    <meta:document-statistic meta:table-count="0" meta:image-count="0" meta:object-count="0" meta:page-count="1" meta:paragraph-count="25" meta:word-count="92" meta:character-count="612" meta:non-whitespace-character-count="552"/>
  </office:meta>
</office:document-meta>
</file>